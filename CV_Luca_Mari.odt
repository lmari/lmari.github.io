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9C400000407DEFC1DA5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6.33cm" fo:margin-left="0cm" fo:margin-top="0cm" fo:margin-bottom="0cm" fo:break-before="auto" fo:break-after="auto" table:align="left"/>
    </style:style>
    <style:style style:name="Table2.A" style:family="table-column">
      <style:table-column-properties style:column-width="5.597cm"/>
    </style:style>
    <style:style style:name="Table2.B" style:family="table-column">
      <style:table-column-properties style:column-width="6.703cm"/>
    </style:style>
    <style:style style:name="Table2.C" style:family="table-column">
      <style:table-column-properties style:column-width="2.291cm"/>
    </style:style>
    <style:style style:name="Table2.D" style:family="table-column">
      <style:table-column-properties style:column-width="1.73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Title" style:master-page-name="Standard">
      <style:paragraph-properties style:page-number="1"/>
    </style:style>
    <style:style style:name="P2" style:family="paragraph" style:parent-style-name="Text_20_body">
      <style:text-properties officeooo:paragraph-rsid="0046ad51"/>
    </style:style>
    <style:style style:name="P3" style:family="paragraph" style:parent-style-name="Body_20_Text_20_L">
      <style:text-properties officeooo:paragraph-rsid="0017d061"/>
    </style:style>
    <style:style style:name="P4" style:family="paragraph" style:parent-style-name="Body_20_Text_20_L">
      <style:text-properties officeooo:paragraph-rsid="001826d1"/>
    </style:style>
    <style:style style:name="P5" style:family="paragraph" style:parent-style-name="Body_20_Text_20_L">
      <style:text-properties style:font-name="Times New Roman" fo:font-size="11pt" fo:font-weight="normal" officeooo:paragraph-rsid="001826d1" style:font-size-asian="11pt" style:font-weight-asian="normal" style:font-size-complex="11pt" style:font-weight-complex="normal"/>
    </style:style>
    <style:style style:name="P6" style:family="paragraph" style:parent-style-name="Body_20_Text_20_0">
      <style:text-properties officeooo:paragraph-rsid="00189081"/>
    </style:style>
    <style:style style:name="P7" style:family="paragraph" style:parent-style-name="Text_20_body">
      <style:text-properties officeooo:paragraph-rsid="001826d1"/>
    </style:style>
    <style:style style:name="P8" style:family="paragraph" style:parent-style-name="Text_20_body">
      <style:paragraph-properties fo:text-align="justify" style:justify-single-word="false"/>
      <style:text-properties officeooo:paragraph-rsid="001a0292"/>
    </style:style>
    <style:style style:name="P9" style:family="paragraph" style:parent-style-name="Body_20_Text_20_0">
      <style:text-properties officeooo:paragraph-rsid="001a0292"/>
    </style:style>
    <style:style style:name="P10" style:family="paragraph" style:parent-style-name="Body_20_Text_20_0L">
      <style:text-properties officeooo:paragraph-rsid="001a0292"/>
    </style:style>
    <style:style style:name="P11" style:family="paragraph" style:parent-style-name="Text_20_body">
      <style:text-properties officeooo:paragraph-rsid="001b3354"/>
    </style:style>
    <style:style style:name="P12" style:family="paragraph" style:parent-style-name="Text_20_body">
      <style:text-properties style:font-name="Times New Roman" fo:font-size="10pt" officeooo:paragraph-rsid="001b3354" style:font-size-asian="10pt" style:font-size-complex="10pt"/>
    </style:style>
    <style:style style:name="P13" style:family="paragraph" style:parent-style-name="Body_20_Text_20_0L">
      <style:text-properties officeooo:paragraph-rsid="001b9e08"/>
    </style:style>
    <style:style style:name="P14" style:family="paragraph" style:parent-style-name="Standard">
      <style:text-properties style:font-name="Times New Roman" fo:font-size="10pt" style:font-size-asian="10pt" style:font-size-complex="10pt"/>
    </style:style>
    <style:style style:name="P15" style:family="paragraph" style:parent-style-name="Text_20_body">
      <style:text-properties fo:font-size="10pt" style:font-size-asian="10pt" style:font-size-complex="10pt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Body_20_Text_20_0">
      <style:text-properties officeooo:paragraph-rsid="0046ad51"/>
    </style:style>
    <style:style style:name="P18" style:family="paragraph" style:parent-style-name="Standard">
      <style:paragraph-properties fo:margin-left="0.499cm" fo:margin-right="0cm" fo:text-align="left" style:justify-single-word="false" fo:orphans="2" fo:widows="2" fo:text-indent="-0.499cm" style:auto-text-indent="false"/>
      <style:text-properties style:font-name="Times New Roman" fo:font-size="10pt" style:font-size-asian="10pt" style:font-size-complex="10pt"/>
    </style:style>
    <style:style style:name="P19" style:family="paragraph" style:parent-style-name="Standard">
      <style:paragraph-properties fo:margin-left="0.499cm" fo:margin-right="0cm" fo:text-align="left" style:justify-single-word="false" fo:orphans="2" fo:widows="2" fo:text-indent="-0.499cm" style:auto-text-indent="false"/>
      <style:text-properties style:font-name="Times New Roman" fo:font-size="10pt" officeooo:rsid="00419287" officeooo:paragraph-rsid="00419287" style:font-size-asian="10pt" style:font-size-complex="10pt"/>
    </style:style>
    <style:style style:name="P20" style:family="paragraph" style:parent-style-name="Standard">
      <style:paragraph-properties fo:margin-left="0.499cm" fo:margin-right="0cm" fo:text-align="left" style:justify-single-word="false" fo:orphans="2" fo:widows="2" fo:text-indent="-0.499cm" style:auto-text-indent="false"/>
      <style:text-properties style:font-name="Times New Roman" fo:font-size="10pt" officeooo:rsid="003ff9d1" officeooo:paragraph-rsid="003ff9d1" style:font-size-asian="10pt" style:font-size-complex="10pt"/>
    </style:style>
    <style:style style:name="P21" style:family="paragraph" style:parent-style-name="Standard">
      <style:paragraph-properties fo:margin-left="0.499cm" fo:margin-right="0cm" fo:text-align="left" style:justify-single-word="false" fo:orphans="2" fo:widows="2" fo:text-indent="-0.499cm" style:auto-text-indent="false"/>
      <style:text-properties style:font-name="Times New Roman" fo:font-size="10pt" officeooo:paragraph-rsid="002e448e" style:font-size-asian="10pt" style:font-size-complex="10pt"/>
    </style:style>
    <style:style style:name="P22" style:family="paragraph" style:parent-style-name="Standard">
      <style:paragraph-properties fo:margin-left="0.499cm" fo:margin-right="0cm" fo:text-align="left" style:justify-single-word="false" fo:orphans="2" fo:widows="2" fo:text-indent="-0.499cm" style:auto-text-indent="false"/>
      <style:text-properties style:font-name="Times New Roman"/>
    </style:style>
    <style:style style:name="P23" style:family="paragraph" style:parent-style-name="Standard">
      <style:paragraph-properties fo:margin-left="0.499cm" fo:margin-right="0cm" fo:text-align="left" style:justify-single-word="false" fo:orphans="2" fo:widows="2" fo:text-indent="-0.499cm" style:auto-text-indent="false"/>
      <style:text-properties style:font-name="Times New Roman" fo:font-size="10pt" officeooo:rsid="00437906" officeooo:paragraph-rsid="00437906" style:font-size-asian="10pt" style:font-size-complex="10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lef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lef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officeooo:rsid="004899e5" officeooo:paragraph-rsid="004899e5" style:font-name-asian="Times New Roman1" style:font-size-asian="10pt" style:font-style-asian="normal" style:font-weight-asian="normal" style:font-name-complex="Times New Roman1" style:font-size-complex="10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lef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officeooo:paragraph-rsid="004899e5" style:font-name-asian="Times New Roman1" style:font-size-asian="10pt" style:font-style-asian="normal" style:font-weight-asian="normal" style:font-name-complex="Times New Roman1" style:font-size-complex="10pt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lef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28" style:family="paragraph" style:parent-style-name="Body_20_Text_20_0L" style:master-page-name="">
      <loext:graphic-properties draw:fill="none" draw:fill-color="#729fcf"/>
      <style:paragraph-properties fo:margin-left="0.3cm" fo:margin-right="0cm" fo:margin-top="0cm" fo:margin-bottom="0cm" style:contextual-spacing="false" fo:line-height="100%" fo:text-align="justify" style:justify-single-word="false" fo:text-indent="-0.3cm" style:auto-text-indent="false" style:page-number="auto" fo:background-color="transparent"/>
      <style:text-properties officeooo:paragraph-rsid="002ffd3f"/>
    </style:style>
    <style:style style:name="P29" style:family="paragraph" style:parent-style-name="Body_20_Text_20_0L">
      <loext:graphic-properties draw:fill="none" draw:fill-color="#729fcf"/>
      <style:paragraph-properties fo:margin-left="0.3cm" fo:margin-right="0cm" fo:margin-top="0cm" fo:margin-bottom="0cm" style:contextual-spacing="false" fo:line-height="100%" fo:text-align="justify" style:justify-single-word="false" fo:text-indent="-0.3cm" style:auto-text-indent="false" fo:background-color="transparent"/>
      <style:text-properties officeooo:paragraph-rsid="002ffd3f"/>
    </style:style>
    <style:style style:name="P30" style:family="paragraph" style:parent-style-name="Heading_20_3">
      <style:text-properties officeooo:paragraph-rsid="004899e5"/>
    </style:style>
    <style:style style:name="P31" style:family="paragraph" style:parent-style-name="Body_20_Text_20_0L">
      <style:paragraph-properties fo:margin-left="0cm" fo:text-indent="0cm" style:auto-text-indent="false"/>
    </style:style>
    <style:style style:name="T1" style:family="text">
      <style:text-properties officeooo:rsid="0046ad51"/>
    </style:style>
    <style:style style:name="T2" style:family="text">
      <style:text-properties officeooo:rsid="00387a45"/>
    </style:style>
    <style:style style:name="T3" style:family="text">
      <style:text-properties officeooo:rsid="003170ea"/>
    </style:style>
    <style:style style:name="T4" style:family="text">
      <style:text-properties officeooo:rsid="0017d061"/>
    </style:style>
    <style:style style:name="T5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046ad51" style:font-size-asian="9pt" style:font-size-complex="9pt"/>
    </style:style>
    <style:style style:name="T8" style:family="text">
      <style:text-properties fo:font-size="9pt" officeooo:rsid="00397513" style:font-size-asian="9pt" style:font-size-complex="9pt"/>
    </style:style>
    <style:style style:name="T9" style:family="text">
      <style:text-properties officeooo:rsid="00437906"/>
    </style:style>
    <style:style style:name="T10" style:family="text">
      <style:text-properties officeooo:rsid="00321ebc"/>
    </style:style>
    <style:style style:name="T11" style:family="text">
      <style:text-properties officeooo:rsid="0036b1d3"/>
    </style:style>
    <style:style style:name="T12" style:family="text">
      <style:text-properties officeooo:rsid="004899e5"/>
    </style:style>
    <style:style style:name="T13" style:family="text">
      <style:text-properties officeooo:rsid="002e448e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font-style="normal" style:font-size-asian="10pt" style:font-style-asian="normal" style:font-size-complex="10pt"/>
    </style:style>
    <style:style style:name="T16" style:family="text">
      <style:text-properties officeooo:rsid="001cdfb1"/>
    </style:style>
    <style:style style:name="T17" style:family="text">
      <style:text-properties officeooo:rsid="00164423"/>
    </style:style>
    <style:style style:name="T18" style:family="text">
      <style:text-properties fo:font-size="10pt" fo:language="zxx" fo:country="none" fo:font-weight="bold" officeooo:rsid="000fa814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font-size="10pt" fo:language="zxx" fo:country="none" officeooo:rsid="000fa814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font-weight="bold"/>
    </style:style>
    <style:style style:name="T21" style:family="text">
      <style:text-properties officeooo:rsid="004a065a"/>
    </style:style>
    <style:style style:name="fr1" style:family="graphic" style:parent-style-name="Graphics">
      <style:graphic-properties fo:margin-left="0.002cm" fo:margin-right="0.002cm" fo:margin-top="0.002cm" fo:margin-bottom="0.002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0.06pt solid #ffffff" style:mirror="none" fo:clip="rect(4.113cm, 6.101cm, 5.576cm, 6.74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uca Mari, Curriculum Vitae, <text:span text:style-name="T1">aprile</text:span> 202<text:span text:style-name="T2">6</text:span></text:p>
      <text:p text:style-name="P2">Professore Ordinario di Scienza della Misurazione <text:span text:style-name="T1">nel</text:span><text:span text:style-name="T3">la Facoltà di Lettere e Filosofia dell'Università Cattolica di Milano, </text:span><text:span text:style-name="T1">dove</text:span><text:span text:style-name="T3"> è docente titolare del corso di Data Analysis (corso di laurea in Filosofia). </text:span><text:span text:style-name="T1">A</text:span>ll'Università Cattaneo - LIUC di Castellanza (VA) è docente titolare dei corsi di Analisi dei Dati Sperimentali e Statistica <text:span text:style-name="T3">(corso di laurea in Ingegneria Gestionale)</text:span>, Progettazione per Sistemi Dinamici <text:span text:style-name="T3">(corso di laurea magistrale in Ingegneria Gestionale)</text:span>, Digital Thinking <text:span text:style-name="T3">(corso di laurea in Economia Aziendale), Introduction to Scientific Knowledge (PhD)</text:span>.</text:p>
      <text:p text:style-name="Text_20_body">Svolge attività di ricerca a proposito di Scienza della Misurazione e sulle sue relazioni con le Scienze e Tecnologie dell'Informazione, per cui è autore di varie pubblicazioni scientifiche, e svolge attività di disseminazione, in scuole, aziende e organizzazioni varie, a proposito di cultura del digitale e in particolare di intelligenza artificiale.</text:p>
      <text:p text:style-name="Heading_20_2">Incarichi in organizzazioni scientifiche</text:p>
      <text:p text:style-name="Body_20_Text_20_L">– Rappresentante dell'International Electrotechnical Commission (IEC) nel Joint Committee for Guides in Metrology (JCGM, <text:a xlink:type="simple" xlink:href="https://www.bipm.org/en/committees/jc/jcgm" text:style-name="Internet_20_link" text:visited-style-name="Visited_20_Internet_20_Link">https://www.bipm.org/en/committees/jc/jcgm</text:a>) ed esperto dell'IEC nel WG2 (VIM, <text:a xlink:type="simple" xlink:href="https://www.bipm.org/en/committees/jc/jcgm/wg/jcgm-wg2-vim" text:style-name="Internet_20_link" text:visited-style-name="Visited_20_Internet_20_Link">https://www.bipm.org/en/committees/jc/jcgm/wg/jcgm-wg2-vim</text:a>; 2007) del JCGM.</text:p>
      <text:p text:style-name="P3">– Chair del Task Group Fundamental Concepts in Metrology (CCU-TG-FCM, <text:a xlink:type="simple" xlink:href="https://www.bipm.org/en/committees/cc/ccu/wg/ccu-tg-fcm" text:style-name="Internet_20_link" text:visited-style-name="Visited_20_Internet_20_Link">https://www.bipm.org/en/committees/cc/ccu/wg/ccu-tg-fcm</text:a>; 202<text:span text:style-name="T4">5</text:span>).</text:p>
      <text:p text:style-name="P3">– Presidente della Society for the Study of Measurement (SSM, <text:a xlink:type="simple" xlink:href="https://www.measurementsociety.org/" text:style-name="Internet_20_link" text:visited-style-name="Visited_20_Internet_20_Link">https://www.measurementsociety.org</text:a>; 2024).</text:p>
      <text:p text:style-name="P4">– Presidente (secondo mandato, rinnovato; 2020) della Commissione Tecnica Metrologia, congiunta dell'Ente Italiano di Normazione (UNI) e della Commissione Elettrotecnica Italiana (CEI), dopo esserne stato vicepresidente (2011) (<text:a xlink:type="simple" xlink:href="https://www.uni.com/normazione/organi-tecnici/dettaglio-commissione/?id=44" text:style-name="Internet_20_link" text:visited-style-name="Visited_20_Internet_20_Link">https://www.uni.com/normazione/organi-tecnici/dettaglio-commissione/?id=44</text:a>) (sotto la sua presidenza la Commissione ha sviluppato la norma UNI CEI 11902:2023, "Attività professionali non regolamentate - Tecnico Metrologo - Requisiti di conoscenza, abilità, autonomia e responsabilità"; <text:a xlink:type="simple" xlink:href="https://store.uni.com/uni-cei-11902-2023" text:style-name="Internet_20_link" text:visited-style-name="Visited_20_Internet_20_Link">https://store.uni.com/uni-cei-11902-2023</text:a>).</text:p>
      <text:p text:style-name="Body_20_Text_20_L">– Membro della Commissione Centrale Tecnica dell'UNI.</text:p>
      <text:p text:style-name="Body_20_Text_20_L">– Membro della Commissione Superiore Tecnica del CEI.</text:p>
      <text:p text:style-name="P5">– È stato presidente (due mandati, rinnovato) dell'IEC Technical Committee 1 – Terminology (2012-2020).</text:p>
      <text:p text:style-name="P5">– È stato segretario dell'IEC Technical Committee 25 - Quantities and units (2012-2020).</text:p>
      <text:p text:style-name="P5">– È stato prima segretario scientifico (due mandati, rinnovato; 2000-2006) e poi presidente (due mandati, rinnovato; 2006-2012) del Technical Committee 7 - Measurement Science - dell'International Measurement Confederation (IMEKO).</text:p>
      <text:p text:style-name="P5">– È stato presidente del Comitato Tecnico CEI 1/25 - Terminologia, grandezze e unità.</text:p>
      <text:p text:style-name="P5">– È stato coordinatore della linea di ricerca "Metrologia" del Gruppo di Misure Elettriche ed Elettroniche (GMEE).</text:p>
      <text:p text:style-name="Heading_20_2">Incarichi accademici</text:p>
      <text:p text:style-name="P6">Presso l'Università Cattaneo - LIUC è stato:</text:p>
      <text:p text:style-name="P6"><text:span text:style-name="T5">–</text:span> coordinatore (2008-2013) del Dottorato di Ricerca in Gestione Integrata d'Azienda;</text:p>
      <text:p text:style-name="P6"><text:span text:style-name="T5">–</text:span> direttore dell'Istituto di Metodi Quantitativi (2005-2012);</text:p>
      <text:p text:style-name="P6"><text:span text:style-name="T5">–</text:span> direttore dell'Istituto di Tecnologie (2007-2012);</text:p>
      <text:p text:style-name="P6"><text:span text:style-name="T5">–</text:span> direttore di Lab#ID, laboratorio sui sistemi RFId e IoT (2007-2016);</text:p>
      <text:p text:style-name="P7"><text:span text:style-name="T5">–</text:span> direttore di SmartUp, laboratorio di fabbricazione digitale (2014-2016).</text:p>
      <text:p text:style-name="Text_20_body">Presso l'Università Cattolica, sede di Milano, è stato progettista e coordinatore dell'indirizzo in tecnologie informatiche del corso di laurea in Lingue e Letterature Straniere (1998-2006).</text:p>
      <text:p text:style-name="Heading_20_2"><text:soft-page-break/>Altre attività scientifiche</text:p>
      <text:p text:style-name="P8">È stato direttore, coordinatore, progettista, ricercatore in numerosi progetti di formazione e ricerca, e in particolare è stato il coordinatore del progetto di ricerca europeo (Horizon 2020) DiDIY, Digital Do It Yourself (2015-2017, 7 partner, 2 M€), e ricercatore del progetto di ricerca europeo (Esprit II) CadEx, CAD Data Exchange (1990-1993).</text:p>
      <text:p text:style-name="Text_20_body">Ha partecipato come ricercatore a vari progetti PRIN: "Modellizzazione, identificazione delle alternative di gestione e valutazione dell'impatto economico di sistemi logistici aeroportuali complessi" (1998); "Problemi d'agenzia e scelte finanziarie negli hedge funds: opportunità e rischi per l'investitore" (2001); "Computer Supported Cooperative Learning and Knowing (CSCLK): validazione di metodologie e di strumenti per la creazione e condivisione di conoscenza nella Pubblica Amministrazione" (2003); "Dalla scena del crimine, alla costruzione di un modello per l'analisi e interpretazione dei dati, al profilo logico-investigativo dell'autore" (2005); "Gli effetti della valutazione sulla ricerca accademica: produzione della conoscenza e problemi metodologici" (2017); "Caratterizzazione e misura dell'alfabetizzazione dell'informazione visuale" (2022).</text:p>
      <text:p text:style-name="Text_20_body">È stato componente del comitato editoriale delle riviste Measurement e Metrology and Measurement Systems.</text:p>
      <text:p text:style-name="P7">Ha operato come revisore scientifico delle riviste Acta IMEKO, The British Journal for the Philosophy of Science, Clinical Chemistry and Laboratory Medicine, European Journal for Philosophy of Science, Frontiers in Psychology - Quantitative Psychology and Measurement, IEEE Transaction on Instrumentation &amp; Measurement; Measurement; Measurement Sensors; Measurement: Interdisciplinary Research and Perspectives; Measurement Science and Technology; Measurement Science Review; Metrologia; Metrology and Measurement Systems; NCSLI Measure: The Journal of Measurement Science; <text:span text:style-name="T2">Nuova Secondaria; </text:span>Philosophy of Science; Proceedings of the Royal Society A (Mathematical, Physical and Engineering Sciences); Program; Pure and Applied Chemistry; Quality &amp; Quantity; Review of General Psychology.</text:p>
      <text:p text:style-name="P7">È stato componente del comitato scientifico di numerose conferenze scientifiche nel contesto della scienza della misurazione.</text:p>
      <text:p text:style-name="P7">È stato coeditor delle seguenti special issues su riviste internazionali: "Logical and philosophical aspects of measurement" (Measurement, 2005); "The evolving science of measurement" (Metrology and Measurement Systems, 2007); "Historical papers on fundamentals of measurement" (Acta IMEKO, 2014); "Measurement at the crossroads: measuring and modeling" (Measurement, 2024).</text:p>
      <text:p text:style-name="P7">Dal 2015 è il curatore della rubrica "Metrologia generale" nella rivista "Tutto_Misure", per cui ha pubblicato come autore o coautore oltre 40 articoli su temi di scienza della misurazione.</text:p>
      <text:p text:style-name="P7">È stato (1993-2002) segretario scientifico del Comitato Organizzatore della conferenza "La Giornata della Misurazione".</text:p>
      <text:p text:style-name="P7">È incluso del database della Stanford University del 2% dei ricercatori più produttivi, nel settore dell'Ingegneria, sottosettore Ingegneria Elettrica ed Elettronica (<text:a xlink:type="simple" xlink:href="https://elsevier.digitalcommonsdata.com/datasets/btchxktzyw/7" text:style-name="Internet_20_link" text:visited-style-name="Visited_20_Internet_20_Link">https://elsevier.digitalcommonsdata.com/datasets/btchxktzyw/7</text:a>).</text:p>
      <text:p text:style-name="P7">È l'autore del software alla base delle versioni ufficiali dei siti web del Vocabolario Internazionale di Metrologia del JCGM (VIM, <text:a xlink:type="simple" xlink:href="https://jcgm.bipm.org/vim/en" text:style-name="Internet_20_link" text:visited-style-name="Visited_20_Internet_20_Link">https://jcgm.bipm.org/vim/en</text:a>) e del Vocabolario Internazionale di Metrologia Legale dell'OIML (VIML, <text:a xlink:type="simple" xlink:href="http://viml.oiml.info/" text:style-name="Internet_20_link" text:visited-style-name="Visited_20_Internet_20_Link">http://viml.oiml.info</text:a>).</text:p>
      <text:p text:style-name="P7">È il progettista e il principale sviluppatore di STGraph (<text:a xlink:type="simple" xlink:href="https://lmari.github.io/stgraph" text:style-name="Internet_20_link" text:visited-style-name="Visited_20_Internet_20_Link">https://lmari.github.io/stgraph</text:a>), un engine software per la simulazione di sistemi dinamici.</text:p>
      <text:p text:style-name="Heading_20_2">Lezioni a invito in contesti internazionali</text:p>
      <text:p text:style-name="P9">È stato invitato a tenere lezioni / presentazioni su temi di scienza della misurazione da numerose istituzioni, tra cui (in ordine inverso di data; si veda anche <text:a xlink:type="simple" xlink:href="https://lmari.github.io/alect" text:style-name="Internet_20_link" text:visited-style-name="Visited_20_Internet_20_Link">https://lmari.github.io/alect</text:a>):</text:p>
      <text:p text:style-name="Body_20_Text_20_0L"><text:span text:style-name="T5">–</text:span> IMEKO TC6 International Conference on Metrology and Digital Transformation (5.9.2025), lecture: “Foundational concepts of measurement in the context of a formal ontology”</text:p>
      <text:p text:style-name="Body_20_Text_20_0L"><text:span text:style-name="T5">–</text:span> International School of Physics “Enrico Fermi”, Varenna (12.7.2025), lecture: "What is measurement and <text:soft-page-break/>what might it become?"</text:p>
      <text:p text:style-name="Body_20_Text_20_0L"><text:span text:style-name="T5">–</text:span> Euramet 19th General Assembly, Berlin (4.6.2025), keynote lecture: "Fundamental concepts of metrology in the perspective of the International Vocabulary of Metrology"</text:p>
      <text:p text:style-name="Body_20_Text_20_0L"><text:span text:style-name="T5">–</text:span> "On scale and measurement in the sciences" workshop, University of Oslo (27.3.2025), lecture: "Interpreting the basic evaluation equation as an ontological stance"</text:p>
      <text:p text:style-name="Body_20_Text_20_0L"><text:span text:style-name="T5">–</text:span> University of California, Berkeley (4.8.2024), workshop: "Learning Machines and measurement-related issues"</text:p>
      <text:p text:style-name="Body_20_Text_20_0L"><text:span text:style-name="T5">–</text:span> University of California, Berkeley (4.8.2024), workshop: "Measurement across the sciences"</text:p>
      <text:p text:style-name="Body_20_Text_20_0L"><text:span text:style-name="T5">–</text:span> Metrologia 2023, Rio de Janeiro (30.11.2023), plenary talk: "An overview of the VIM4 2CD"</text:p>
      <text:p text:style-name="Body_20_Text_20_0L"><text:span text:style-name="T5">–</text:span> 2023 IEEE International Conference on Metrology for eXtended Reality, Artificial Intelligence and Neural Engineering, Milano (27.10.2023), lecture: "Some introductory ideas for the panel 'AI: across innovations and ethics'"</text:p>
      <text:p text:style-name="Body_20_Text_20_0L"><text:span text:style-name="T5">–</text:span> "Formal Ontologies, Applied Sciences, and Data" workshop, Università di Bologna (3.10.2023), lecture: "Measurement: more than property representation"</text:p>
      <text:p text:style-name="Body_20_Text_20_0L"><text:span text:style-name="T5">–</text:span> IMEKO TC7 Symposium (31.8.2022), plenary talk: "On the importance of maintaining a distinction between measurement and computation</text:p>
      <text:p text:style-name="Body_20_Text_20_0L"><text:span text:style-name="T5">–</text:span> SCM, St.Petersburg (27.5.2021), plenary talk: "Measurement, computation, simulation, etc: is there still a difference in the “big data” age?"</text:p>
      <text:p text:style-name="Body_20_Text_20_0L"><text:span text:style-name="T5">–</text:span> IOMW, Berkeley (4.2.2021), plenary talk: "Measurement, computation, simulation, etc: is there still a difference in the “big data” age?"</text:p>
      <text:p text:style-name="Body_20_Text_20_0L"><text:span text:style-name="T5">–</text:span> Université de Genève (14.10.2020), lecture: "Metrology and standardization"</text:p>
      <text:p text:style-name="Body_20_Text_20_0L"><text:span text:style-name="T5">–</text:span> IEC General Meeting - TC 1 Workshop, Shanghai (20.10.2019), lecture: "The implementation of the revised SI in IEC standards"</text:p>
      <text:p text:style-name="Body_20_Text_20_0L"><text:span text:style-name="T5">–</text:span> Université de Genève (14.10.2019), lecture: "Metrology and standardization"</text:p>
      <text:p text:style-name="Body_20_Text_20_0L"><text:span text:style-name="T5">–</text:span> Université de Genève (9.10.2018), lecture: "Metrology and standardization"</text:p>
      <text:p text:style-name="Body_20_Text_20_0L"><text:span text:style-name="T5">–</text:span> Inter-University Centre, Dubrovnik (17.4.2018), lecture: "Some notes about truth in measurement"</text:p>
      <text:p text:style-name="Body_20_Text_20_0L">-- University of California, Berkeley, course "Education 274C: The Philosophy of Measurement - Spring 2014" (23.1.2018), lecture: "Metrology"</text:p>
      <text:p text:style-name="Body_20_Text_20_0L"><text:span text:style-name="T5">–</text:span> Université de Genève (16.10.2017), lecture: "Metrology and standardization"</text:p>
      <text:p text:style-name="Body_20_Text_20_0L"><text:span text:style-name="T5">–</text:span> Université Paris 7 Diderot (12.6.2017), lecture: "An epistemology (and some sketches of a related ontology) of quantities"</text:p>
      <text:p text:style-name="Body_20_Text_20_0L"><text:span text:style-name="T5">–</text:span> University of California, Berkeley (31.1.2017), lecture: "Can there be a metrology for psychometricians?"</text:p>
      <text:p text:style-name="Body_20_Text_20_0L"><text:span text:style-name="T5">–</text:span> WSC Academic Day 2016, "Standardization for sustainability: the role of education", Frankfurt, IEC General Meeting (12.10.2016), lecture: "On the evaluation and the communication of data and decisions about sustainability"</text:p>
      <text:p text:style-name="Body_20_Text_20_0L"><text:span text:style-name="T5">–</text:span> Université de Genève (5.10.2016), lecture: "Metrology and standardization"</text:p>
      <text:p text:style-name="Body_20_Text_20_0L"><text:span text:style-name="T5">–</text:span> University of Cambridge (UK) (20.5.2016), lecture: "Definitional uncertainty: a definitionally uncertain (or vague) quantity?"</text:p>
      <text:p text:style-name="Body_20_Text_20_0L"><text:span text:style-name="T5">–</text:span> Université de Genève (7.10.2015), lecture: "Metrology and standardization"</text:p>
      <text:p text:style-name="Body_20_Text_20_0L"><text:span text:style-name="T5">–</text:span> Warwick Business School (21.7.2015), lecture: "Some reflections on what is measurement - and what it is not"</text:p>
      <text:p text:style-name="Body_20_Text_20_0L"><text:span text:style-name="T5">–</text:span> Université de Genève (23.10.2014), lecture: "Metrology and standardization"</text:p>
      <text:p text:style-name="P10"><text:span text:style-name="T5">–</text:span> University of California, Berkeley, course "Education 274C: The Philosophy of Measurement - Spring 2014" (22.4.2014), lecture: "Metrology"</text:p>
      <text:p text:style-name="Body_20_Text_20_0L"><text:span text:style-name="T5">–</text:span> University of California, Berkeley (20-22.11.2013), series of workshops: "Models of measurement: the general structure"; "Models of measurement: measuring systems and metrological infrastructure", "An overview on measurement uncertainty: from the standpoint of the Guide to the Expression of Uncertainty in Measurement (GUM)", "Is the body of knowledge on measurement worth to be a 'science', and what may be the scope of a measurement science?"</text:p>
      <text:p text:style-name="P10"><text:span text:style-name="T5">–</text:span> University of California, Berkeley (19.11.2013), lecture: "Outline of the current status of measurement science: from the point of view of the International Vocabulary of Metrology (VIM)"</text:p>
      <text:p text:style-name="P10"><text:span text:style-name="T5">–</text:span> ZiF, Bielefeld (15.3.2013), lecture: "Outline of the current status of measurement science: from the point of view of the International Vocabulary of Metrology (VIM)"</text:p>
      <text:p text:style-name="P10"><text:span text:style-name="T5">–</text:span> Helsinki University (14.12.2012), lecture: "Bridging social and physical measurement: measurement is not scale construction; measurement is not quantification"</text:p>
      <text:p text:style-name="P10"><text:soft-page-break/><text:span text:style-name="T5">–</text:span> Université Paris 7 Diderot (4.12.2012), lecture: "The (non-traditional) concept of measurement uncertainty is tied to the (traditional) concept of quantity value: analysis and consequences"</text:p>
      <text:p text:style-name="P10"><text:span text:style-name="T5">–</text:span> Psychometric Society - 77th annual conference (11.7.2012), plenary talk: "An overview on measurement uncertainty"</text:p>
      <text:p text:style-name="P10"><text:span text:style-name="T5">–</text:span> Psychometric Society - 77th annual conference (9.7.2012), workshop: "Models of measurement: from an engineering point of view"</text:p>
      <text:p text:style-name="P10"><text:span text:style-name="T5">–</text:span> Lorenz Center, Leiden (25.10.2011), lecture: "The 'error approach' and the 'uncertainty approach': are they incompatible?"</text:p>
      <text:p text:style-name="P10"><text:span text:style-name="T5">–</text:span> Université Paris 7 Diderot (13.3.2012), lecture: "Measurement uncertainty as a unifying concept for expressing the quality of measurement data"</text:p>
      <text:p text:style-name="P10"><text:span text:style-name="T5">–</text:span> Cranfield University (23.11.2011), lecture: "A pragmatic perspective on measurement"</text:p>
      <text:p text:style-name="Heading_20_2">Attività didattiche e di disseminazione culturale</text:p>
      <text:p text:style-name="Text_20_body">È stato direttore, coordinatore, progettista, docente in numerosi progetti di formazione.</text:p>
      <text:p text:style-name="Text_20_body">È <text:span text:style-name="T1">stato </text:span>direttore culturale (2017-<text:span text:style-name="T1">2025</text:span>) di idea.lab, Laboratorio Territoriale per l'Occupabilità della provincia di Varese.</text:p>
      <text:p text:style-name="Text_20_body">Dal 2023 ha pubblicato oltre 30 articoli di disseminazione culturale su temi di intelligenza artificiale sul Sole 24 Ore e sugli stessi temi vari altri articoli in altre riviste <text:span text:style-name="T2">(Allegato 4)</text:span>.</text:p>
      <text:p text:style-name="Text_20_body">Ha svolto un'intensa attività di disseminazione culturale per studenti e docenti di scuola <text:span text:style-name="T2">(Allegato 5)</text:span>, tra cui nel 2021 un ciclo di webinar "Cultura del digitale: un percorso multidisciplinare alla ricerca delle ragioni dell'oggi" seguito da alcune migliaia di studenti.</text:p>
      <text:p text:style-name="Text_20_body">Ha coordinato vari progetti di innovazione didattica rivolti a studenti di scuole secondarie, tra cui Digitalscape, serious game online (con Ufficio Scolastico Territoriale di Varese, giocato da oltre diecimila studenti; <text:a xlink:type="simple" xlink:href="https://www.digitalscape.it/" text:style-name="Internet_20_link" text:visited-style-name="Visited_20_Internet_20_Link">https://www.digitalscape.it</text:a>); GaLe e GaLe2 (Game supported/enhanced Learning; con Camera di Commercio di Varese e Ufficio Scolastico Territoriale di Varese nell'ambito di un progetto Interreg; <text:a xlink:type="simple" xlink:href="https://progettogale.it/" text:style-name="Internet_20_link" text:visited-style-name="Visited_20_Internet_20_Link">https://progettogale.it</text:a>).</text:p>
      <text:p text:style-name="Text_20_body">Ha progettato e realizzato vari percorsi di formazione didattica per docenti di scuola, tra cui La didattica in rete: idee, metodi, strumenti; La motivazione per un apprendimento efficace di contenuti STEM, e su temi di intelligenza artificiale, a partire dal 2023, oltre 10 percorsi per docenti, oltre 20 seminari per studenti, oltre 25 studenti per docenti.</text:p>
      <text:p text:style-name="Text_20_body">Ha svolto un'intensa attività di disseminazione culturale su temi di intelligenza artificiale, con lezioni e interventi invitati in contesti vari (scuole, come indicato sopra, università, aziende, ordini professionali, associazioni culturali, media, ...): oltre 70 nel 2023, circa 120 nel 2024, oltre 1<text:span text:style-name="T2">5</text:span>0 nel 2025 (<text:span text:style-name="T2">Allegato 6)</text:span>.</text:p>
      <text:p text:style-name="P11">Ha ricevuto il premio "Berchet 2025" dalla scuola in cui si è diplomato (<text:a xlink:type="simple" xlink:href="https://liceoberchet.edu.it/2025/01/30/l-ai-e-noi-il-premio-berchet-a-luca-mari-esperto-di-ai" text:style-name="Internet_20_link" text:visited-style-name="Visited_20_Internet_20_Link">https://liceoberchet.edu.it/2025/01/30/l-ai-e-noi-il-premio-berchet-a-luca-mari-esperto-di-ai</text:a>).</text:p>
      <text:p text:style-name="P12"/>
      <text:p text:style-name="Text_20_body">Altre informazioni si trovano nelle pagine del sito web <text:a xlink:type="simple" xlink:href="https://lmari.github.io/" text:style-name="Internet_20_link" text:visited-style-name="Visited_20_Internet_20_Link">https://lmari.github.io</text:a>.</text:p>
      <text:p text:style-name="Text_20_body"/>
      <text:p text:style-name="Heading_20_2">Allegati</text:p>
      <text:p text:style-name="Body_20_Text_20_0L">1. Dati formali</text:p>
      <text:p text:style-name="Body_20_Text_20_0L">2. Pubblicazioni</text:p>
      <text:p text:style-name="P13"><text:span text:style-name="T5">– </text:span>Libri scientifici</text:p>
      <text:p text:style-name="P13"><text:span text:style-name="T5">– </text:span>Pubblicazioni in riviste scientifiche o libri internazionali</text:p>
      <text:p text:style-name="P13"><text:span text:style-name="T5">– </text:span>Pubblicazioni in riviste scientifiche o libri italiani</text:p>
      <text:p text:style-name="P13"><text:span text:style-name="T5">– </text:span>Pubblicazioni in atti di conferenze – Su invito</text:p>
      <text:p text:style-name="P13"><text:span text:style-name="T5">– </text:span>Pubblicazioni in atti di conferenze internazionali</text:p>
      <text:p text:style-name="P13"><text:span text:style-name="T5">– </text:span>Pubblicazioni in atti di conferenze nazionali</text:p>
      <text:p text:style-name="P13"><text:span text:style-name="T5">– </text:span>Edizioni di numeri di riviste</text:p>
      <text:p text:style-name="P13"><text:soft-page-break/><text:span text:style-name="T5">– </text:span>Edizioni di libri</text:p>
      <text:p text:style-name="P13"><text:span text:style-name="T5">– </text:span>Libri didattici o di disseminazione culturale</text:p>
      <text:p text:style-name="P13"><text:span text:style-name="T5">– </text:span>E-libri</text:p>
      <text:p text:style-name="Body_20_Text_20_0L">3. Attività didattica universitaria</text:p>
      <text:p text:style-name="Body_20_Text_20_0L">4. Pubblicazioni su giornali o riviste non scientifiche a proposito di intelligenza artificiale</text:p>
      <text:p text:style-name="Body_20_Text_20_0L"/>
      <text:p text:style-name="P14"/>
      <text:p text:style-name="Text_20_body"/>
      <text:p text:style-name="P15">Autorizzo il trattamento dei miei dati personali ai sensi dell'art. 13 d. lgs. 30 giugno 2003 n°196 – "Codice in materia di protezione dei dati personali" e dell'art. 13 GDPR 679/16 – "Regolamento europeo sulla protezione dei dati personali".</text:p>
      <text:p text:style-name="P15">Il sottoscritto, Luca Mari, consapevole delle sanzioni penali previste dall'art. 76 T.U. N. 445 del 28.12.2000 sulle disposizioni legislative e regolamentari in materia di documentazione amministrativa nel caso di mendaci dichiarazioni o esibizione di atti falsi o contenenti dati non rispondenti a verità, dichiara sotto la propria responsabilità che quanto sopra riportato risponde a verità.</text:p>
      <text:p text:style-name="P15">(le informazioni presentate a nome "Luca Mari" in questo documento e i suoi allegati si riferiscono a Luca Paolo Maria Mari)</text:p>
      <text:p text:style-name="P15"/>
      <text:p text:style-name="Text_20_body"><text:tab/><text:tab/><text:tab/><text:tab/><text:tab/><text:tab/><text:tab/><text:tab/><text:span text:style-name="T6">Buccinasco, </text:span><text:span text:style-name="T7">aprile</text:span><text:span text:style-name="T6"> 202</text:span><draw:frame draw:style-name="fr1" draw:name="image1.gif" text:anchor-type="char" svg:x="10.324cm" svg:y="0.554cm" svg:width="5.212cm" svg:height="1.836cm" draw:z-index="0"><draw:image xlink:href="Pictures/10000001000009C400000407DEFC1DA5.gif" xlink:type="simple" xlink:show="embed" xlink:actuate="onLoad" draw:mime-type="image/gif"/></draw:frame><text:span text:style-name="T8">6</text:span></text:p>
      <text:p text:style-name="P16">Allegato 1. Dati formali</text:p>
      <text:p text:style-name="Body_20_Text_20_0">Luca Paolo Maria Mari</text:p>
      <text:p text:style-name="Body_20_Text_20_0">residente in via Piero della Francesca 1, 20090 Buccinasco (MI), Italia</text:p>
      <text:p text:style-name="Body_20_Text_20_0">nato a Milano il 6 maggio 1962</text:p>
      <text:p text:style-name="Body_20_Text_20_0">di nazionalità Italiana</text:p>
      <text:p text:style-name="Body_20_Text_20_0">Telefono: +39 347 8065727</text:p>
      <text:p text:style-name="Body_20_Text_20_0">Email: lmari@liuc.it </text:p>
      <text:p text:style-name="Body_20_Text_20_0">Codice Fiscale: MRALPL62E06F205V</text:p>
      <text:p text:style-name="Body_20_Text_20_0"/>
      <text:p text:style-name="Body_20_Text_20_0">Percorso di formazione</text:p>
      <text:p text:style-name="Body_20_Text_20_0">Dal 1976 al 1981: Liceo Classico G. Berchet, Milano, Italia</text:p>
      <text:p text:style-name="Body_20_Text_20_0">Dal 1981 al 1987: Università degli Studi, Milano, Italia, Corso di Laurea in Fisica</text:p>
      <text:p text:style-name="Body_20_Text_20_0">Dal 1989 al 1990: Istituto di Tecnologie Industriali e Automazione - Consiglio Nazionale delle Ricerche, Milano, Italia, borsa di studio sul tema "Modelli di intelligenza artificiale per il CAD"</text:p>
      <text:p text:style-name="Body_20_Text_20_0">Dal 1991 al 1994: Politecnico di Torino, Dottorato di Ricerca in "Metrologia: scienza e tecnica delle misure"</text:p>
      <text:p text:style-name="Body_20_Text_20_0"/>
      <text:p text:style-name="Body_20_Text_20_0">Carriera accademica</text:p>
      <text:p text:style-name="Body_20_Text_20_0">1.5.1995: ricercatore universitario</text:p>
      <text:p text:style-name="Body_20_Text_20_0">1.5.1998: ricercatore confermato</text:p>
      <text:p text:style-name="Body_20_Text_20_0">1.3.2001: professore associato </text:p>
      <text:p text:style-name="Body_20_Text_20_0">1.3.2004: professore associato confermato</text:p>
      <text:p text:style-name="Body_20_Text_20_0">1.5.2006: professore straordinario</text:p>
      <text:p text:style-name="Body_20_Text_20_0">1.5.2009: professore ordinario</text:p>
      <text:p text:style-name="Body_20_Text_20_0">(tutti questi ruoli in quello che attualmente si chiama "S.S.D. IMIS-01/B - Misure elettriche ed elettroniche", presso l'Università Cattaneo LIUC, attualmente presso la Scuola di Ingegneria Industriale)</text:p>
      <text:p text:style-name="P17">1.<text:span text:style-name="T1">4</text:span>.20<text:span text:style-name="T1">26</text:span>: professore ordinario</text:p>
      <text:p text:style-name="P17">("S.S.D. IMIS-01/B - Misure elettriche ed elettroniche", presso l'Università <text:span text:style-name="T1">Cattolica</text:span>, <text:span text:style-name="T1">Facoltà di Lettere e Filosofia</text:span>)</text:p>
      <text:p text:style-name="P17"/>
      <text:p text:style-name="Body_20_Text_20_0"/>
      <text:p text:style-name="Body_20_Text_20_0">ORCID id: 0000-0002-7128-3453</text:p>
      <text:p text:style-name="Body_20_Text_20_0">Scopus Author id: 6603599345</text:p>
      <text:p text:style-name="P16">Allegato 2. Pubblicazioni</text:p>
      <text:p text:style-name="Heading_20_3">Libri scientifici</text:p>
      <text:p text:style-name="P18">L.Mari, M.Wilson, A.Maul, Measurement across the sciences -- Developing a shared concept system for measurement, Springer Nature, 2021, seconda edizione 2023 </text:p>
      <text:p text:style-name="Heading_20_3">Pubblicazioni in riviste scientifiche o libri internazionali</text:p>
      <text:p text:style-name="P19">A81. M.Wilson, L.Mari, Mapping out the Hexagon Measurement Framework as a blueprint underlying measurement in the human sciences, Journal of Educational Measurement, 2026, doi:10.1111/jedm.70036, in pubblicazione</text:p>
      <text:p text:style-name="P18">A80. A.Giordani, L.Mari, A <text:span text:style-name="T9">f</text:span>ramework for understanding the ethics of human-AI interactions - Exploring the moral dimensions of artificial intelligence entities, in: Humane Artificial Intelligence - From Foundations to Application and Policy Framework, G.Riva, M.Chiriatti (eds.), Vita e Pensiero, 2025</text:p>
      <text:p text:style-name="P18">A79. A.Giordani, L.Mari, Measurement, in: The Routledge Handbook of the History of Philosophy of Science After Kant, F.Padovani, A.Tamas Tuboly (eds.), Routledge, 2025</text:p>
      <text:p text:style-name="P18">A78. A.Giordani, L.Mari, Measurement and simulation: A conceptual framework, Measurement 259, 2026, doi:10.1016/j.measurement.2025.119783</text:p>
      <text:p text:style-name="P18">A7<text:span text:style-name="T10">7</text:span>. L.Mari, D.Petri, Fundamentals of measurement: an evolutionary perspective, IEEE Instrumentation and Measurement Magazine, 28, 9, 2025, doi:10.1109/MIM.2025.11273172</text:p>
      <text:p text:style-name="P18">A76. L.Mari, R.J.C.Brown, C.Narduzzi, G.Nordin, S.Trapmann, D.Varela Magalhães, What is measurement uncertainty? A discussion, Metrologia, <text:span text:style-name="T11">62, </text:span>2025, doi:10.1088/1681-7575/ae1f1e</text:p>
      <text:p text:style-name="P18">A75. F.Bertolotti, N.Kadera, L.Pasquino, L.Mari, An epidemiological extension of the El Farol Bar problem, Front. Big Data, 8, 2025, doi:10.3389/fdata.2025.1519369</text:p>
      <text:p text:style-name="P18">A74. G.Lanza, M.Koval, F.Grasso Toro, M.Kuster, H.Gasca Aragón, D.Nahuel Coppa, M.Iturrate-García, M.Küpferling, M.Gruber, J.L.Hippolyte, L.Mari, Establishment of good practices for the usage of machine-actionable core metrological terminology, Measurement: Sensors, 2024, doi:10.1016/j.measen.2024.101456</text:p>
      <text:p text:style-name="P18">A73. L.Mari, A.Giordani, F. Grégis, Measurement at the Crossroads: Measuring and Modeling (editorial), Measurement 2024, doi:10.1016/j.measurement.2024.115019</text:p>
      <text:p text:style-name="P18">A72. L.Mari, D.Petri, Fundamentals of measurement: the limits of empirical knowledge, IEEE Instrumentation and Measurement Magazine, 27, 7, 2024, doi:10.1109/MIM.2024.10700739</text:p>
      <text:p text:style-name="P18">A71. L.Mari, D.Petri, Fundamentals of measurement: designing the acquisition of knowledge, IEEE Instrumentation and Measurement Magazine, 27, 1, 2024, doi:10.1109/MIM.2024.10423655</text:p>
      <text:p text:style-name="P18">A70. D.Petri, L.Mari, M.Brunelli, P.Carbone, Information-enabled decision-making in big data scenarios, in: IEEE Technology and Engineering Management Society Body of Knowledge (TEMSBOK), Gustavo Giannattasio et al. (eds.), 2023, ISBN: 978-1-119-98760-4</text:p>
      <text:p text:style-name="P18">A69. A.Giordani, L.Mari, On the interpretation of the measurement equation, Measurement 222, 2023, doi:10.1016/j.measurement.2023.113598</text:p>
      <text:p text:style-name="P18">A68. L. Mari, D. Petri, Fundamentals of Measurement – Measurement: the social spread of knowledge, in pubblicazione su IEEE Instrumentation and Measurement Magazine</text:p>
      <text:p text:style-name="P18">A67. L.Mari, D.Petri, Fundamentals of Measurement – Measurement: knowledge from information about empirical properties, IEEE Instrumentation and Measurement Magazine, 26, 1, 2023, doi:10.1109/MIM.2023.10034974</text:p>
      <text:p text:style-name="P18">A66. L.Mari, Measurement, in: The SAGE Encyclopedia of Theory in Science, Technology, Engineering, and Mathematics, J.M.Mattingly (ed.), 2022</text:p>
      <text:p text:style-name="P18">A65. L.Mari, D.Petri, Measurement, dataism and post-truth ideology: the good, the bad and the ugly, IEEE Instrumentation and Measurement Magazine, 25, 7, 2022, doi:10.1109/MIM.2022.9908261</text:p>
      <text:p text:style-name="P18">A64. L.Mari, Is our understanding of measurement evolving?, Acta IMEKO, 10, 4, 2021, doi:10.21014/acta_imeko.v10i4.1169</text:p>
      <text:p text:style-name="P18">A63. A.Giordani, L.Mari, On theory dependence of truth in measurement, Perspectives on Science, 29, 6, 757-781, 2021, doi:10.1162/posc_a_00393</text:p>
      <text:p text:style-name="P18">A62. A.Locoro, W.P.Fisher, L.Mari, Visual Information Literacy: definition, construct modelling and assessment, IEEE Access, 2021, doi: 10.1109/ACCESS.2021.3078429</text:p>
      <text:p text:style-name="P18">A61. S.Shirmohammadi, L.Mari, D.Petri, On the commonly-used incorrect visual representation of accuracy and precision, IEEE Instrumentation and Measurement Magazine, 24, 1, 2021, doi: 10.1109/MIM.2021.9345597</text:p>
      <text:p text:style-name="P18">A60. D.Petri, P.Carbone, L.Mari, Quality of measurement information in decision making, IEEE Trans. Instr. Meas., 70, 1-16, 2021, doi:10.1109/TIM.2020.3047954</text:p>
      <text:p text:style-name="P18">A59. L.Mari, C.Narduzzi, G.Nordin, S.Trapmann, Foundations of uncertainty in evaluation of nominal properties, Measurement, 152, 1-7, 2020, doi:10.1016/j.measurement.2019.107397</text:p>
      <text:p text:style-name="P18">A58. L.Mari, J.Goodwin, E.Jacobson, L.Pendrill, The definitions of the base units in the revised SI: a terminological analysis, Measurement, 150, 1-5, 2020, doi:10.1016/j.measurement.2019.05.106976</text:p>
      <text:p text:style-name="P18"><text:soft-page-break/>A57. A.Giordani, L.Mari, A structural model of direct measurement, Measurement, 145, 535-550, 2019, doi:10.1016/j.measurement.2019.05.060</text:p>
      <text:p text:style-name="P18">A56. A.Giordani, L.Mari, Strategies for the definition of a system of units, in: The reform of the International System of Units (SI), N.de Courtenay, O.Darrigol, O.Schlaudt (eds.), 75-98, Routledge, 2019, ISBN: 978-1-138-48385-9</text:p>
      <text:p text:style-name="P18">A55. A.Maul, L.Mari, M.Wilson, Intersubjectivity of measurement across the sciences, Measurement, 131, 764-770, 2019, doi:10.1016/j.measurement.2018.08.068</text:p>
      <text:p text:style-name="P18">A54. L.Mari, C.D.Ehrlich, L.R.Pendrill, Measurement units as quantities of objects or values of quantities: a discussion, Metrologia, 55, 716-721, 2018, doi:10.1088/1681-7575/aad8d8</text:p>
      <text:p text:style-name="P18">A53. A.Maul, L.Mari, D.Torres Irribarra, M.Wilson, The quality of measurement results in terms of the structural features of the measurement process, Measurement, 116, 611-620, 2018, doi:10.1016/j.measurement.2017.08.046</text:p>
      <text:p text:style-name="P18">A52. L.Mari, P.Carbone, A.Giordani, D.Petri, A structural interpretation of measurement and some related epistemological issues, Studies in History and Philosophy of Science, 65-66, 46-56, 2017, doi:10.1016/j.shpsa.2017.08.001</text:p>
      <text:p text:style-name="P18">A51. L.Mari, Can formal methods provide (necessary and) sufficient conditions for measurement? (commentary), Measurement: Interdisciplinary Research and Perspectives, 15, 2, 73-75, 2017, doi:10.1080/15366367.2017.1367246</text:p>
      <text:p text:style-name="P18">A50. L.Mari, Toward a harmonized treatment of nominal properties in metrology, Metrologia, 54, 784-795, 2017, doi:10.1088/1681-7575/aa8521</text:p>
      <text:p text:style-name="P18">A49. L.Mari, D.Petri, The metrological culture in the context of Big Data: Managing data-driven decision confidence, IEEE Instrumentation and Measurement Magazine, 20, 5, 4-20, 2017, doi:10.1109/MIM.2017.8036688</text:p>
      <text:p text:style-name="P18">A48. L.Mari, P.Blattner, F.Pavese, Improving the understandability of the next edition of the International System of Units (SI) by focusing on its conceptual structure, Measurement, 101, 200-205, 2017, doi:10.1016/j.measurement.2017.01.039</text:p>
      <text:p text:style-name="P18">A47. L.Mari, A.Maul, D.Torres Irribarra, M.Wilson, Quantities, quantification, and the necessary and sufficient conditions for measurement, Measurement, 100, 115-121, 2017, doi:10.1016/j.measurement.2016.12.050</text:p>
      <text:p text:style-name="P18">A46. L.Mari, P.Carbone, D.Petri, Fundamentals of hard and soft measurement: a pragmatic and structural perspective, in: Modern measurements: fundamentals and applications, A.Ferrero, D.Petri, P.Carbone, M.Catelani (eds.), 203-262, Wiley, 2015, ISBN: 978-1-118-17131-8</text:p>
      <text:p text:style-name="P18">A45. D.Petri, L.Mari, P.Carbone, A structured methodology for measurement development, IEEE Trans. Instr. Meas., 64, 9, 2367-2379, 2015, doi:10.1109/TIM.2015.2399023</text:p>
      <text:p text:style-name="P18">A44. A.Mencattini, L.Mari, A conceptual framework for concept definition in measurement: the case of 'sensitivity', Measurement, 72,77-87, 2015, doi:10.1016/j.measurement.2015.04.030</text:p>
      <text:p text:style-name="P18">A43. L.Mari, An overview of the current status of measurement science: from the standpoint of the International Vocabulary of Metrology (VIM), in: Standardization in Measurement. Philosophical and Sociological Issues, L.Huber. O.Schlaudt (eds.), Pickering and Chatto, 2015, ISBN 978-1-84893-571-6</text:p>
      <text:p text:style-name="P18">A42. L.Mari, Evolution of 30 years of the International Vocabulary of Metrology (VIM), Metrologia, 52, R1-R10, 2015, doi:10.1088/0026-1394/52/1/R1</text:p>
      <text:p text:style-name="P18">A41. L.Mari, D.Petri, Measurement science: constructing bridges between reality and knowledge, IEEE Instrumentation and Measurement Magazine, 17, 6, 6-11, 2014, doi:10.1109/MIM.2014.6968922</text:p>
      <text:p text:style-name="P18">A40. P.Micheli, L.Mari, The theory and practice of performance measurement, Management Accounting Research, 25, 2, 147-156, 2014, doi:10.1016/j.mar.2013.07.005</text:p>
      <text:p text:style-name="P18">A39. L.Mari, Introductory notes for the Acta IMEKO Special Issue on "Historical papers on fundamentals of measurement" (editorial), Acta IMEKO, 3, 1, 2-3, 2014</text:p>
      <text:p text:style-name="P18">A38. L.Mari, M.Wilson, An introduction to the Rasch measurement approach for metrologists, Measurement, 51, 315-327, 2014, doi:10.1016/j.measurement.2014.02.014</text:p>
      <text:p text:style-name="P18">A37. A.Giordani, L.Mari, Modeling measurement: error and uncertainty, in: Error and uncertainty in scientific practice, M.Boumans, G.Hon, A.C.Petersen (eds.), 79-86, Pickering &amp; Chatto, 2014, ISBN 978-1-84893-416-0</text:p>
      <text:p text:style-name="P18">A36. A.Frigerio, A.Giordani, L.Mari, On representing information: a characterization of the analog/digital distinction, Dialectica, 67, 4, 455–483, 2013, doi:10.1111/1746-8361.12040</text:p>
      <text:p text:style-name="P18">A35. L.Mari, A quest for the definition of measurement, Measurement, 46, 2889-2895, 2013, doi:10.1016/j.measurement.2013.04.039</text:p>
      <text:p text:style-name="P18">A34. L.Mari, A.Giordani, Quantity and quantity value, Metrologia, 49, 756–764, 2012, doi:10.1088/0026-1394/49/6/756</text:p>
      <text:p text:style-name="P18">A33. A.Giordani, L.Mari, Measurement, models, and uncertainty, IEEE Trans. Instr. Meas., 61, 8, 2144-2152, 2012, doi:10.1109/TIM.2012.2193695</text:p>
      <text:p text:style-name="P18">A32. L.Mari, P.Carbone, D.Petri, Measurement fundamentals: a pragmatic view, IEEE Trans. Instr. Meas., 61, 8, 2107-2115, 2012, doi:10.1109/TIM.2012.2193693</text:p>
      <text:p text:style-name="P18">A31. L.Mari, Measurement science and its evolution, article 6.8.31 in: Physical Methods, Instruments and Measurements, Encyclopedia of Life Support Systems (EOLSS), developed under the auspices of the UNESCO, Eolss Publishers, Oxford, UK, 2012 [http://www.eolss.net]</text:p>
      <text:p text:style-name="P18"><text:soft-page-break/>A30. A.Giordani, L.Mari, Property evaluation types, Measurement, 45, 437-452, 2012, doi:10.1016/j.measurement.2011.10.030</text:p>
      <text:p text:style-name="P18">A29. V.Lazzarotti, R.Manzini, L.Mari, A model for R&amp;D performance measurement, Int. J. Production Economics, 134, 212-223, 2011, doi:10.1016/j.ijpe.2011.06.018</text:p>
      <text:p text:style-name="P18">A28. D.Macii, L.Mari, D.Petri, Comparison of measured quantity value estimators in nonlinear models, IEEE Trans. Instr. Meas., 59, 1, 238-246, 2010, doi:10.1109/TIM.2009.2023820</text:p>
      <text:p text:style-name="P18">A27. A.Frigerio, A.Giordani, L.Mari, Outline of a general model of measurement, Synthese, 175, 2, 123-149, 2010, doi:10.1007/s11229-009-9466-3</text:p>
      <text:p text:style-name="P18">A26. L.Mari, On (kinds of) quantities, Metrologia, 46, L11-L15, 2009, doi:10.1088/0026-1394/46/3/N01</text:p>
      <text:p text:style-name="P18">A25. L.Mari, A computational system for uncertainty propagation of measurement results, Measurement, 42, 6, 844-855, 2009, doi:10.1016/j.measurement.2009.01.011</text:p>
      <text:p text:style-name="P18">A24. L.Mari, V.Lazzarotti, R.Manzini, Measurement in soft systems: epistemological framework and a case study, Measurement, 42, 2, 241-253, 2009, doi:10.1016/j.measurement.2008.06.004</text:p>
      <text:p text:style-name="P18">A23. P.Carbone, L.Buglione, L.Mari, D.Petri, A comparison between foundations of Metrology and Software Measurement, IEEE Trans. Instr. Meas., 57, 2, 235-241, 2008, doi:10.1109/TIM.2007.909614</text:p>
      <text:p text:style-name="P18">A22. C.Mari, S.Genone, L.Mari, E-Learning and new teaching scenarios: the mediation of technology between methodologies and teaching objectives, in: Web-based education and pedagogical technologies: solutions for learning applications, L.Esnault (ed.), IGI, 2008</text:p>
      <text:p text:style-name="P18">A21. L.Mari, Measurability, in: Measurement in Economics, M.Boumans (ed.), 41-77, Elsevier, 2007, ISBN 978-0-12-370489-4</text:p>
      <text:p text:style-name="P18">A20. L.Mari, R.Morawski, The evolving science of measurement (editorial), Metrology and Measurement Systems, XIII, 1, 3-8, 2007</text:p>
      <text:p text:style-name="P18">A19. L.Mari, S.Sartori, A Relational Theory of Measurement: traceability as a solution to the non-transitivity of measurement results, Measurement, 40, 2, 233-242, 2007, doi:10.1016/j.measurement.2006.06.014</text:p>
      <text:p text:style-name="P18">A18. S.Genone, C.Mari, L.Mari, e-Learning and new didactic scenarios: the mediation of technology between methodologies and didactic goals, International Journal of Web-based Learning and Teaching Technologies, 1, 3, 28-44, 2006</text:p>
      <text:p text:style-name="P18">A17. L.Finkelstein, R.Morawski, L.Mari, Logical and philosophical aspects of measurement (editorial) Measurement, 38, 4, 257-258, 2005, doi:10.1016/j.measurement.2005.09.001</text:p>
      <text:p text:style-name="P18">A16. L.Mari, The problem of foundations of measurement, Measurement, 38, 4, 259-266, 2005, doi:10.1016/j.measurement.2005.09.006</text:p>
      <text:p text:style-name="P18">A15. L.Mari, Errors in digital signal systems, in: Handbook of Measuring System Design, P.Sydenham, R.Thorn (eds.), 314-317, Wiley, 2005, ISBN 0-470-02143-8</text:p>
      <text:p text:style-name="P18">A14. L.Mari, Explanation of key error and uncertainty concepts and terms, in: Handbook of Measuring System Design, P.Sydenham, R.Thorn (eds.), 331-335, Wiley, 2005,ISBN 0-470-02143-8</text:p>
      <text:p text:style-name="P18">A13. L.Mari, Principles of semiotics as related to measurement, in: Handbook of Measuring System Design, P.Sydenham, R.Thorn (eds.), 134-139, Wiley, 2005, ISBN 0-470-02143-8</text:p>
      <text:p text:style-name="P18">A12. L.Mari, Characteristics and theory of knowledge, in: Handbook of Measuring System Design, P.Sydenham, R.Thorn (eds.), 127-133, Wiley, 2005, ISBN 0-470-02143-8</text:p>
      <text:p text:style-name="P18">A11. L.Mari, Models of the measurement process, in: Handbook of Measuring System Design, P.Sydenham, R.Thorn (eds.), 681-684, Wiley, 2005, ISBN 0-470-02143-8</text:p>
      <text:p text:style-name="P18">A10. L.Mari, Epistemology of measurement, Measurement, 34, 1, 17-30, 2003, doi:10.1016/S0263-2241(03)00016-2</text:p>
      <text:p text:style-name="P18">A9. L.Mari, L.Reznik, Uncertainty in measurement: some thoughts about its expressing and processing, in: Soft computing in measurement and information acquisition, L.Reznik, V.Kreinovich (eds.), 1-9, Springer, 2003, ISBN 3-540-00246-4</text:p>
      <text:p text:style-name="P18">A8. L.Mari, G.Zingales, Uncertainty in Measurement Science, in: Measurement Science – A discussion, K.Karija, L.Finkelstein (eds.), Ohmsha, IOS Press, 2000, ISBN 4-274-90398-2 (Ohmsha Ltd.) / 1-58603-088-4 (IOS Press)</text:p>
      <text:p text:style-name="P18">A7. L.Mari, Beyond the representational viewpoint: a new formalization of measurement, Measurement, 27, 2, 71-84, 2000, doi:10.1016/S0263-2241(99)00055-X</text:p>
      <text:p text:style-name="P18">A6. L.Mari, Notes towards a qualitative analysis of information in measurement results, Measurement, 25, 3, 183-192, 1999, doi:10.1016/S0263-2241(99)00002-0</text:p>
      <text:p text:style-name="P18">A5. L.Mari, The role of determination and assignment in measurement, Measurement, 21, 3, 79-90, 1997, doi:10.1016/S0263-2241(97)00050-X</text:p>
      <text:p text:style-name="P18">A4. L.Mari, The meaning of “quantity” in measurement, Measurement, 17, 2, 127-138, 1996, doi:10.1016/0263-2241(96)00022-X</text:p>
      <text:p text:style-name="P18">A3. M.Actis Dato, L.Ferrari, C.Godio, L.Mari, Integrated quality-oriented data management, International Journal of CADCAM and Computer Graphics / Revue International de CFAO, 9, 3, 281-293, 1994</text:p>
      <text:p text:style-name="P18">A2. L.Mari, On the comparison of inexact measurement results, Measurement, 9, 4, 157-162, 1991, doi:10.1016/0263-2241(91)90011-E</text:p>
      <text:p text:style-name="P18"><text:soft-page-break/>A1. P.Bottoni, L.Mari, P.Mussio, Empirical plausible reasoning by multiple-valued logic, in: Uncertainty in knowledge bases - Lecture notes in computer science, B.Bouchon-Meunier, R.Yager, L.Zadeh (eds.), 279-285, Springer-Verlag, 1991</text:p>
      <text:p text:style-name="Heading_20_3">Pubblicazioni in riviste scientifiche o libri italiani</text:p>
      <text:p text:style-name="P20">B8<text:span text:style-name="T12">2</text:span>. L.Mari, La metrologia nella società della comunicazione - Qualche riflessione, Tutto_Misure, <text:span text:style-name="T12">1</text:span>, 202<text:span text:style-name="T12">6</text:span></text:p>
      <text:p text:style-name="P20">B81. L.Mari, F.Bertolotti, L.Carimali, L.C.Foschi, A.Giordani, A.Negrini, C.Pisoni, S.Sancassani, P.Zuffinetti, Intelligenza artificiale e formazione: perché e come imparare e insegnare oggi?, Nuova Secondaria, 6, febbraio 2026</text:p>
      <text:p text:style-name="P21">B80. L.Mari, D.Petri, Riflessioni sulla caratterizzazione metrologica dei sistemi di Machine Learning - Sistemi per la classificazione - Seconda parte, Tutto_Misure, 4, 2025</text:p>
      <text:p text:style-name="P21">B79. L.Mari, M.Ingaggiati, R.Ruffini, L'AI entra nei processi aziendali, Sviluppo &amp; Organizzazione, 322, 2025</text:p>
      <text:p text:style-name="P21">B7<text:span text:style-name="T13">8</text:span>. L.Mari, D.Petri, Riflessioni sulla caratterizzazione metrologica dei sistemi di Machine Learning – <text:span text:style-name="T13">Sistemi </text:span>per la classificazione, Tutto_Misure, <text:span text:style-name="T13">3</text:span>, 2025</text:p>
      <text:p text:style-name="P21">B77. L.Mari, A.Giordani, D.Petri, Un'introduzione all'Intelligenza Artificiale Generativa - Terza parte: Intelligenza Artificiale Generativa, Tutto_Misure, 2, 2025</text:p>
      <text:p text:style-name="P18">B76. L.Mari, A.Giordani, D.Petri, Un'introduzione all'Intelligenza Artificiale Generativa - Seconda parte: Reti neurali artificiali, Tutto_Misure, 1, 2025</text:p>
      <text:p text:style-name="P18">B75. L.Mari, Cos'è l'incertezza di misura, dunque?, Tutto_Misure, 1, 2025</text:p>
      <text:p text:style-name="P18">B74. L.Mari, A.Giordani, D.Petri, Un'introduzione all'Intelligenza Artificiale Generativa - Prima parte: Machine Learning, Tutto_Misure, 4, 2024</text:p>
      <text:p text:style-name="P18">B73. L.Mari, È cambiato il concetto di unità di misura? - L'impatto della revisione del SI, Tutto_Misure, 4, 2024 </text:p>
      <text:p text:style-name="P18">B72. L.Mari, F.Bertolotti, Un'analisi preliminare della metrologia dell'intelligenza artificiale, Tutto_Misure, 2, 2024</text:p>
      <text:p text:style-name="P18">B71. L.Mari, M.Pradella, La terminologia della metrologia nei laboratori delle strutture sanitarie: un'analisi, Tutto_Misure, 1, 2024</text:p>
      <text:p text:style-name="P18">B70. L.Mari, M.Pradella, La terminologia della metrologia: qualche riflessione con particolare riferimento al caso dei laboratori delle strutture sanitarie, Tutto_Misure, 4, 2023</text:p>
      <text:p text:style-name="P18">B69. L.Mari, F.Bertolotti, D.Petri, Una breve introduzione ai sistemi di intelligenza artificiale nella prospettiva della metrologia, Tutto_Misure, 3, 2023</text:p>
      <text:p text:style-name="P18">B68. L.Mari, Il ruolo sociale della cultura metrologica: qualche ipotesi, AEIT, maggio/giugno 2023</text:p>
      <text:p text:style-name="P18">B67. L.Mari, F.Bertolotti, In dialogo con un agente artificiale a proposito di qualche argomento di metrologia, Tutto_Misure, 2, 2023</text:p>
      <text:p text:style-name="P22"><text:span text:style-name="T14">B66. L.Mari, </text:span><text:span text:style-name="T15">Trasformazione digitale: il prossimo obiettivo fondamentale della metrologia fondamentale?</text:span><text:span text:style-name="T14">, Tutto_Misure, 1, 2023</text:span></text:p>
      <text:p text:style-name="P18">B65. L.Angrisani, G.Betta, P.Carbone, A.Cigada, Z.Del Prete, A.Ferrero, L.Mari, N.Paone, D.Petri, E.Sardini, Verso un "Manifesto per la cultura metrologica"?, Tutto_Misure, 4, 2022</text:p>
      <text:p text:style-name="P18">B64. L.Mari, R.Buccianti, Verso una norma del Tecnico Metrologo, Tutto_Misure, 3, 2022</text:p>
      <text:p text:style-name="P18">B63. L.Mari, A.Ferrero, D.Petri, Le scale di misura: un ponte tra mondo empirico e mondo dell'informazione, Tutto_Misure, 2, 2022</text:p>
      <text:p text:style-name="P18">B62. L.Mari, D.Petri, A.Ferrero, Il ruolo sociale della cultura metrologica: qualche ipotesi, Tutto_Misure, 1, 2022 </text:p>
      <text:p text:style-name="P18">B61. L.Mari, D.Petri, La cultura metrologica tra dataismo e post-verità, Tutto_Misure, 4, 2021</text:p>
      <text:p text:style-name="P18">B60. A.Giordani, L.Mari, D.Petri, La scienza della misurazione è una scienza? di che genere?, Tutto_Misure, 3, 2021</text:p>
      <text:p text:style-name="P18">B59. S.Shirmohammadi, L.Mari, D.Petri, A proposito della (spesso sbagliata...) rappresentazione grafica dell'accuratezza e della precisione, Tutto_Misure, 2, 2021</text:p>
      <text:p text:style-name="P18">B58. L.Mari, C.Narduzzi, Verso una nuova edizione del Vocabolario Internazionale di Metrologia (VIM)?, Tutto_Misure, 1, 2021</text:p>
      <text:p text:style-name="P18">B57. L.Mari, R.Buccianti, M.Cibien, Quali competenze ha il metrologo oggi?, Tutto_Misure, 4, 2020 (preprint)</text:p>
      <text:p text:style-name="P18">B56. R.Buccianti, M.Cibien, L.Mari, Le competenze del metrologo, la figura professionale del metrologo, Tutto_Misure, 3, 2020</text:p>
      <text:p text:style-name="P18">B55. M.Cibien, L.Mari, La metrologia tra complessità, incertezza e rischio, Tutto_Misure, 2, 2020</text:p>
      <text:p text:style-name="P18">B54. L.Mari, F.Grégis, A.Giordani, La riscoperta del valor vero? - Seconda parte, Tutto_Misure, 1, 2020</text:p>
      <text:p text:style-name="P18">B53. L.Mari, Intelligenza e comprensione: confronto fra naturale e artificiale, Sviluppo &amp; Organizzazione, 290, 26-32, 2019</text:p>
      <text:p text:style-name="P18">B52. L.Mari, A.Giordani, La riscoperta del valor vero?, Tutto_Misure, 4, 2019</text:p>
      <text:p text:style-name="P18">B51. L.Mari, Maestra, cos'è un kilo? - Come spiegare le nuove definizioni del SI, Tutto_Misure, 3, 2019</text:p>
      <text:p text:style-name="P18">B50. L.Mari, C.Narduzzi, Verso un'incertezza di classificazione – La cultura metrologica nella valutazione delle proprietà classificatorie, Tutto_Misure, 2, 2019</text:p>
      <text:p text:style-name="P18">B49. L.Mari, La qualità è una caratteristica misurabile?, A - Rivista dell'Ordine degli Architetti della Provincia di Trento, 1, 2019</text:p>
      <text:p text:style-name="P18">B48. L.Mari, R.Buccianti, M.Cibien, A.Lazzari, Il concetto di modello di misura, Tutto_Misure, 1, 2019</text:p>
      <text:p text:style-name="P18">B47. L.Mari, Cosa accadrà alle unità di base nel nuovo SI?, Tutto_Misure, 4, 2018</text:p>
      <text:p text:style-name="P18"><text:soft-page-break/>B46. L.Mari, La misurazione, tra conservazione e riforma, Tutto_Misure, 3, 2018</text:p>
      <text:p text:style-name="P18">B45. L.Mari, A.Giordani, D.Petri, C'è ancora una differenza tra misurare e calcolare? - Seconda parte, Tutto_Misure, 2, 2018</text:p>
      <text:p text:style-name="P18">B44. F.Bertolotti, L.Mari, Agent-Based Modeling: un'analisi critica della bibliografia e delle relazioni con la Teoria Generale dei Sistemi, Università Cattaneo Research Reports, 3, 2018</text:p>
      <text:p text:style-name="P18">B43. R.Ruffini, L.Mari, Lavoro umano e intelligenza artificiale - Uno scenario di possibili evoluzioni, Persone&amp;Conoscenze, 128, 62-66, 2018</text:p>
      <text:p text:style-name="P18">B42. L.Mari, A.Giordani, D.Petri, C'è ancora una differenza tra misurare e calcolare?, Tutto_Misure, 1, 2018</text:p>
      <text:p text:style-name="P18">B41. L.Mari, D.Petri, Quale ruolo della metrologia nel mondo dei big data?, Tutto_Misure, 4, 2017</text:p>
      <text:p text:style-name="P18">B40. L.Mari, S.Astuti, A.Ravarini, R.Ruffini, Industria 4.0: una nuova rivoluzione?, Sviluppo &amp; Organizzazione, 277, 40-52, 2017</text:p>
      <text:p text:style-name="P18">B39. L.Mari, Unità di misura e valori di grandezze – Seconda parte, Tutto_Misure, 3, 2017</text:p>
      <text:p text:style-name="P18">B38. L.Mari, Unità di misura e valori di grandezze, Tutto_Misure, 2, 2017</text:p>
      <text:p text:style-name="P18">B37. L.Mari, D.Petri, Cos'è la metrologia, insomma?, Tutto_Misure, 1, 2017</text:p>
      <text:p text:style-name="P18">B36. L.Mari, I risultati di misura: un'esplorazione, Tutto_Misure, 4, 2016</text:p>
      <text:p text:style-name="P18">B35. L.Mari, Accuratezza di misura: qualche nota, Tutto_Misure, 3, 2016</text:p>
      <text:p text:style-name="P18">B34. L.Mari, Definizione del misurando e incertezza di definizione - Un'introduzione, Tutto_Misure, 2, 2016</text:p>
      <text:p text:style-name="P18">B33. L.Mari, F. Pavese, Ancora sul nuovo SI, Tutto_Misure, 1, 2016</text:p>
      <text:p text:style-name="P18">B32. L.Mari, La taratura degli strumenti di misura: un tentativo di chiarimento di un problema fondamentale, Tutto_Misure, 4, 2015</text:p>
      <text:p text:style-name="P18">B31. L.Mari, M.Cibien, Il Vocabolario Internazionale di Metrologia (VIM): passato, presente e futuro, U&amp;C, 8, 23-26, 2015</text:p>
      <text:p text:style-name="P18">B30. L.Mari, La revisione del Sistema Internazionale di unità (SI): una rivoluzione in arrivo?, U&amp;C, 8, 29-31, 2015</text:p>
      <text:p text:style-name="P18">B29. L.Mari, Il nuovo SI – Seconda parte, Tutto_Misure, 3, 2015</text:p>
      <text:p text:style-name="P18">B28. L.Mari, Il nuovo SI, Tutto_Misure, 2, 2015</text:p>
      <text:p text:style-name="P18">B27. L.Mari, La nuova Guida all'Incertezza di Misura, Tutto_Misure, 1, 2015</text:p>
      <text:p text:style-name="P18">B26. L.Mari, La revisione del VIM, Tutto_Misure, 3, 2014</text:p>
      <text:p text:style-name="P18">B25. L.Mari, Problemi (tentativamente filosofici) del controllo, in: Strutture di mondo II, L.Urbani Ulivi (ed.), Il Mulino, 2013</text:p>
      <text:p text:style-name="P18">B24. L.Mari, Proprietà classificatorie: Qualche considerazione sulla misurabilità oltre le unità di misura, Tutto_Misure, 2, 2013</text:p>
      <text:p text:style-name="P18">B23. A.Giordani, L.Mari, Problemi filosofici del controllo, Rivista di Filosofia Neo-Scolastica, 4, 661-686, 2012</text:p>
      <text:p text:style-name="P18">B22. L.Mari, Qualche riflessione sulla retroazione come caratteristica sistemica, Rivista di Filosofia Neo-Scolastica, 4, 571-586, 2011</text:p>
      <text:p text:style-name="P18">B21. E.Puddu, L.Mari, Un'introduzione ai sistemi RFId, Tutto_Misure, 1, 2011</text:p>
      <text:p text:style-name="P18">B20. L.Mari, B.I.Rebaglia, Il Vocabolario Internazionale di Metrologia – Un'analisi critica, Tutto_Misure, 4, 2009</text:p>
      <text:p text:style-name="P18">B19. P.Carbone, L.Buglione, L.Mari, D.Petri, Prospettive di misura per il monitoraggio e controllo della produzione di software, De Qualitate, 72-76, febbraio 2009</text:p>
      <text:p text:style-name="P18">B18. L.Mari, S.Sartori, Incertezza delle misure e ottimizzazione dei costi di produzione, Tutto_Misure, 1, 2007</text:p>
      <text:p text:style-name="P18">B17. L.Mari, S.Sartori, Si possono ridurre i costi della riferibilità?, Tutto_Misure, 1, 2006</text:p>
      <text:p text:style-name="P18">B16. L.Mari, (Non-)fondamenti della misurazione, Tutto_Misure, 1, 2005</text:p>
      <text:p text:style-name="P18">B16. L.Mari, Lectures on Measurement Science, LIUC Papers, n.157, 2004 – ISSN 1722-4667</text:p>
      <text:p text:style-name="P18">B15. S.Genone, C.Mari, L.Mari, D.Redolfi, Firma digitale e processo civile telematico in un'esperienza di eLearning, Informatica e diritto, XXX, Vol.XIII, n.1-2, 303-313, 2004</text:p>
      <text:p text:style-name="P18">B14. L.Mari, A.Balsamo, F.Cabiati, Metodi di misura e teoria della misurazione: due temi davvero inconciliabili?, Tutto_Misure, 4, 2001</text:p>
      <text:p text:style-name="P18">B13. L.Mari, Ai fondamenti del problema dell'incertezza delle misure, Tutto_Misure, 1, 2000</text:p>
      <text:p text:style-name="P18">B12. L.Mari, Appunti sul XV Congresso Internazionale IMEKO, Tutto_Misure, 3, 1999</text:p>
      <text:p text:style-name="P18">B11. L.Mari, Internet: caratteristiche e potenzialità, in: C.Vaccà (ed.), Il commercio elettronico, Egea, 1999</text:p>
      <text:p text:style-name="P18">B10. L.Mari, La giornata della misurazione, Qualità – Guida alla Metrologia, settembre-ottobre 1998</text:p>
      <text:p text:style-name="P18">B9. L.Mari, A.Sinatra, Università e formazione continua: il ruolo delle tecnologie, IF - rivista della Fondazione IBM Italia, VI, 3, 94-101, 1998</text:p>
      <text:p text:style-name="P18">B8. L.Mari, La rappresentazione di dati non esatti: un'introduzione, LIUC Papers, n.28, 1996 – ISSN 1722-4667</text:p>
      <text:p text:style-name="P18">B7. L.Mari, La qualità è una caratteristica misurabile?, LIUC Papers, n.9, 1994 – ISSN 1722-4667</text:p>
      <text:p text:style-name="P18">B6. L.Mari, Problemi sulla non esattezza nella misurazione, L'Energia Elettrica, 2, LXX, 52-58, 1993</text:p>
      <text:p text:style-name="P18">B5. L.Mari, Oggettività e soggettività della misurazione, L'Energia Elettrica, 11, LXIX, 441-446, 1992</text:p>
      <text:p text:style-name="P18">B4. L.Mari, Sulla natura relazionale della misurazione, L'Energia Elettrica, 6, LXIX, 241-246, 1992</text:p>
      <text:p text:style-name="P18">B3. L.Mari, Sul concetto di attributo, L'Energia Elettrica, 5, LXIX, 193-196, 1992</text:p>
      <text:p text:style-name="P18">B2. L.Mari, Sul concetto di misurazione, L'Energia Elettrica, 2, LXIX, 51-56, 1992</text:p>
      <text:p text:style-name="P18"><text:soft-page-break/>B1. E.Guagnini, L.Mari, P.Mussio, Valutazione plausibile dei comportamenti di sistemi dinamici da loro descrizioni sincroniche, Dinamica dei sistemi, 3, 65-87, 1989</text:p>
      <text:p text:style-name="Heading_20_3">Pubblicazioni in atti di conferenze – Su invito</text:p>
      <text:p text:style-name="P18">C18. L.Mari, A.Chunovkina, C.Ehrlich, The complex concept of quantity in the past and (possibly) the future of the International Vocabulary of Metrology, proc. Joint International IMEKO TC1+ TC7+ TC13+TC18 Symposium, St Petersburg, Russian Federation, 2-5 July 2019, IOP J. Phys.: Conf. Ser. 1379 012004, doi:10.1088/1742-6596/1379/1/012004</text:p>
      <text:p text:style-name="P18">C17. L.Mari, M.Wilson, A gentle introduction to Rasch measurement models for metrologists, proc. Joint International IMEKO TC1+ TC7+ TC13 Symposium, Genova, Italia, 4-6 September 2013, IOP J. Phys.: Conf. Ser. 459 012002, doi:10.1088/1742-6596/459/1/012002</text:p>
      <text:p text:style-name="P18">C16. L.Mari, Properties as measurands: An overview and some critical issues, proc. 13th IMEKO TC1 &amp; TC7 Joint Symposium, London, UK, 1–3 September 2010, IOP J. Phys.: Conf. Ser. 238 012002, doi:10.1088/1742-6596/238/1/012002</text:p>
      <text:p text:style-name="P18">C15. L.Mari, B.Rebaglia, Il Vocabolario Internazionale di Metrologia: un'analisi critica, proc. Metrologia &amp; Qualità, Torino, 7-9 Apr 2009, CDROM, ISBN 8890314958</text:p>
      <text:p text:style-name="P18">C14. L.Mari, On the measurand definition, proc. XVIII IMEKO World Congress, Rio de Janeiro, 17–22 Sep 2006</text:p>
      <text:p text:style-name="P18">C13. L.Mari, Epistemological status of Measurement Science, proc. IMEKO TC7 Symposium on Advances of Measurement Science, IX-X, Saint-Petersburg, Russia, 30 Jun-2 Jul 2004 – ISBN 5-93629-167-7</text:p>
      <text:p text:style-name="P18">C12. L.Mari, Epistemological foundations of measurement, proc. IMEKO TC7 Symposium on Measurement science of the information era, 12-20, Crakow, Poland, 25-27 Jun 2002 - ISBN 83-89122-01-4</text:p>
      <text:p text:style-name="P18">C11. L.Mari, A.Taroni, Una caratterizzazione delle condizioni per la qualità della misurazione, proc. XVIII Congresso Nazionale GMEE, 219-225, Siena, 18-20 Sep 2001</text:p>
      <text:p text:style-name="P18">C10. L.Mari, The duality of sensing and coding as a fundamental topic of information science, proc. SCI 2001, Vol.16, 177-180, Orlando (Fl.), 22-25 Jul 2001</text:p>
      <text:p text:style-name="P18">C9. L.Mari, G.Zingales, Uncertainty in measurement science, proc. IMEKO TC7 International workshop on Advances in measurement science, 177-189, Kyoto, 19-20 Jun 1999</text:p>
      <text:p text:style-name="P18">C8. L.Mari, Uncertainty in measurement: a survey, proc. ISPRS - WG VI/3, Parma, 15-19 Feb 1999</text:p>
      <text:p text:style-name="P18">C7. L.Mari, The twofold nature of measurement as empirical and linguistic operation, proc. ISPRS - WG VI/3, Parma, 15-19 Feb 1999</text:p>
      <text:p text:style-name="P18">C6. L.Mari, Intelligenza e intelligenza artificiale: una breve bibliografia commentata, proc. XIV Giornata della Misurazione, Como, 22-23 Jun 1995, in: “Qualità”, 4/95, AICQ, 1995</text:p>
      <text:p text:style-name="P18">C5. L.Mari, Considerazioni sul concetto di intelligenza applicato ai sistemi di misura, proc. XIII Giornata della Misurazione, 25-29, Como, 23-24 Jun 1994, Clup</text:p>
      <text:p text:style-name="P18">C4. L.Mari, Concepts of fuzzy data classification, proc. I Workshop on Digital Sensors and Systems, ISPRS TC 1, Trento, 21-25 Jun 1993</text:p>
      <text:p text:style-name="P18">C3. L.Mari, Sulla definizione di relazione di compatibilità e di gruppo compatibile di misure, proc. IX Giornata della Misurazione, 15-30, Como, 7-8 Jun 1990, Clup</text:p>
      <text:p text:style-name="P18">C2. L.Mari, Note sull'applicabilità della teoria degli insiemi sfumati alla teoria della misurazione, proc. IX Giornata della Misurazione, 9-14, Como, 7-8 Jun 1990, Clup</text:p>
      <text:p text:style-name="P18">C1. L.Mari, Introduzione agli insiemi e alle misure sfumate, proc. VIII Giornata della Misurazione, 7-29, Como, 15-16 Jun 1989, Clup</text:p>
      <text:p text:style-name="Heading_20_3">Pubblicazioni in atti di conferenze internazionali</text:p>
      <text:p text:style-name="P23">D56. D.Petri, L.Mari, Learning lessons from the analogies between measurement and machine learning life cycles, <text:s/>IEEE I2MTC 2026, in corso di pubblicazione</text:p>
      <text:p text:style-name="P18">D55. A.Canavesi, L.Cattaneo, F.Bertolotti, G.Buonanno, L.Mari, A.Ravarini, Game Based Learning for enhancing engagement in first-year management engineering students, 22nd SEFI special interest group in mathematics seminar, University of Applied Sciences, Wolfenbüttel, Germany, 25-27 June 2025</text:p>
      <text:p text:style-name="P18">D54. F.Bertolotti, L.Mari, A methodology for limit cycle detection in simulation models, Simulation for a Sustainable Future, EUROSIM, 2023 </text:p>
      <text:p text:style-name="P18">D53. L.Mari, M.Wilson, A.Maul, Measurement across the sciences: Developing a shared concept system for measurement, proc. Joint International IMEKO TC1+TC7+TC13+TC18 Symposium, Porto, Portugal, 31 August-2 July 2022: in corso di pubblicazione</text:p>
      <text:p text:style-name="P18">D52. L.Mari, A.Maul, M.Wilson, On the importance of maintaining a distinction between measurement and computation, proc. Joint International IMEKO TC1+TC7+TC13+TC18 Symposium, Porto, Portugal, 31 August-2 July 2022: in corso di pubblicazione</text:p>
      <text:p text:style-name="P18">D51. D.Petri, P.Carbone, L.Mari, Quality of measurement information in the context of sports applications, proc. IEEE STAR 2022: in corso di pubblicazione</text:p>
      <text:p text:style-name="P18"><text:soft-page-break/>D50. F.Bertolotti, A.Locoro, L.Mari, E.A.Minelli, A.Ravarini, M.R.Stan, The Italian academic research system and its evaluation: a conceptual framework inception, Lecture notes in information systems and organisation, 50, ItAIS 2020, 269719, Pescara, Italy, 16-17 October 2020, pp.278-290, doi:10.1007/978-3-030-86858-1_17</text:p>
      <text:p text:style-name="P18">D49. F.Bertolotti, A.Locoro, L.Mari, Sensitivity to initial conditions in agent-based models, Multi-agent systems and agreement technologies: 17th European conference, EUMAS 2020, Thessaloniki, Greece, 14-15 September 2020, doi:10.1007/978-3-030-66412-1_32</text:p>
      <text:p text:style-name="P18">D48. M.Wilson, L.Mari, A.Maul, The status of the concept of reference object in measurement in the human sciences compared to the physical sciences, proc. Joint International IMEKO TC1+ TC7+ TC13+TC18 Symposium, St Petersburg, Russian Federation, 2-5 July 2019, IOP J. Phys.: Conf. Ser. 1379 012025, doi:10.1088/1742-6596/1379/1/012025</text:p>
      <text:p text:style-name="P18">D47. L.Mari, A.Maul, M.Wilson, Can there be one meaning of “measurement” across the sciences?, proc. Joint International IMEKO TC1+ TC7+ TC13+TC18 Symposium, St Petersburg, Russian Federation, 2-5 July 2019, IOP J. Phys.: Conf. Ser. 1379 012022, doi:10.1088/1742-6596/1379/1/012022 </text:p>
      <text:p text:style-name="P18">D46. L.Mari, R.Ruffini, An analysis of Goodhart's law toward a shared conceptual framework of measurement across the sciences, proc. XVIII IMEKO World Congress, Belfast, UK, 3-6 September 2018, IOP J. Phys.: Conf. Ser. 1065 072022, 2018, doi:10.1088/1742-6596/1065/7/072022</text:p>
      <text:p text:style-name="P18">D45. L.Mari, A.Maul, M.Wilson, On the existence of general properties as a problem of measurement science, proc. XVIII IMEKO World Congress, Belfast, UK, 3-6 September 2018, IOP J. Phys.: Conf. Ser. 1065 072021, 2018, doi:10.1088/1742-6596/1065/7/072021</text:p>
      <text:p text:style-name="P18">D44. A.Locoro, A.Ravarini, F.Cabitza, L.Mari, Is making the new knowing? Tangible and intangible knowledge artifacts in DiDIY, proc. 25th European Conference on Information Systems (ECIS), Guimarães, Portugal, June 5-10, 2017</text:p>
      <text:p text:style-name="P18">D43. L.Mari, A.Maul, D.Torres Irribarra, M.Wilson, A meta-structural understanding of measurement, proc. IMEKO Joint Symposium 2016 TC1-TC7-TC13, J. Phys.: Conf. Ser. 772, 2016, doi:10.1088/1742-6596/772/1/012009</text:p>
      <text:p text:style-name="P18">D42. L.Mari, F.Pavese, A conceptual roadmap for setting up a system of units in the “New SI” context, proc. IMEKO Joint Symposium 2016 TC1-TC7-TC13, J. Phys.: Conf. Ser. 772, 2016, doi:10.1088/1742-6596/772/1/012011</text:p>
      <text:p text:style-name="P18">D41. L.Mari, M.Wilson, A structural framework across strongly and weakly defined measurements, IEEE I2MTC 2015, Pisa, 11-14 May 2015, 1522 – 1526, doi:10.1109/I2MTC.2015.7151504</text:p>
      <text:p text:style-name="P18">D40. L.Mari, A.Mencattini, A property type invariant model of measurement applied to nominal evaluations, proc. IMEKO Joint Symposium 2014 TC1-TC7-TC13, J. Phys.: Conf. Ser. 588, 2014, doi:10.1088/1742-6596/588/1/012008</text:p>
      <text:p text:style-name="P18">D39. L.Mari, A.Giordani, On the input of a measurement process, proc. IMEKO Joint Symposium 2014 TC1-TC7-TC13, J. Phys.: Conf. Ser. 588, 2014 012024, doi:10.1088/1742-6596/588/1/012024</text:p>
      <text:p text:style-name="P18">D38. M.Wilson, L.Mari, A.Maul, D.Torres Irribarra, A comparison of measurement concepts across physical science and social science domains: instrument design, calibration, and measurement, proc. IMEKO Joint Symposium 2014 TC1-TC7-TC13, IOP J. Phys.: Conf. Ser 588, 2014, doi: 10.1088/1742-6596/588/1/012034</text:p>
      <text:p text:style-name="P18">D37. L.Mari, A.Maul, D.Torres Irribarra, M.Wilson, Quantification is neither necessary nor sufficient for measurement, proc. Joint International IMEKO TC1-TC7-TC13 Symposium, Genova, Italia, 4-6 September 2013, IOP J. Phys.: Conf. Ser. 459, 2013, doi:10.1088/1742-6596/459/1/012007</text:p>
      <text:p text:style-name="P18">D36. L.Mari, A.Mencattini, A structured strategy of concept definition in measurement: the case of 'sensitivity', proc. Joint International IMEKO TC1-TC7-TC13 Symposium, Genova, Italia, 4-6 September 2013, IOP J. Phys.: Conf. Ser. 459, 2013, doi:10.1088/1742-6596/459/1/012040</text:p>
      <text:p text:style-name="P18">D35. A.Giordani, L.Mari, Quantity and quantity value, proc. Joint International IMEKO TC1-TC7-TC13 Symposium, Jena, Germany, 31 August-2 September 2011, pp.29-32</text:p>
      <text:p text:style-name="P18">D34. L.Cremona, M.Della Bordella, L.Mainetti, L.Mari, L.Patrono, A.Ravarini, Towards a framework for evaluating the benefits of RFID adoption in supply chains, proc. SoftCOM 2011, Dubrovnik, 15–17 September 2011</text:p>
      <text:p text:style-name="P18">D33. L.Mari, A VIM3-compliant measurement model and some related issues, proc. 13th IMEKO TC1 &amp; TC7 Joint Symposium, London, UK, 1–3 September 2010, IOP J. Phys.: Conf. Ser. 238, 2010, doi:10.1088/1742-6596/238/1/012025</text:p>
      <text:p text:style-name="P18">D32. L.Mari, E.Ugazio, Preliminary analysis of validation of measurement in soft systems, proc. 13th IMEKO TC1 &amp; TC7 Joint Symposium, London, UK, 1–3 September 2010, IOP J. Phys.: Conf. Ser. 238, 2010, doi:10.1088/1742-6596/238/1/012026</text:p>
      <text:p text:style-name="P18">D31. L.Mari, A.Giordani, Towards a concept of property evaluation type, proc. 13th IMEKO TC1 &amp; TC7 Joint Symposium, London, UK, 1–3 September 2010, IOP J. Phys.: Conf. Ser. 238, 2010, doi:10.1088/1742-6596/238/1/012027</text:p>
      <text:p text:style-name="P18">D30. R.Buccianti, M.Cibien, L.Mari, B.Rebaglia, Accuracy, trueness, and precision: considerations based on the International Vocabulary of Metrology (VIM, 3rd ed.) and related standards, proc. XIX IMEKO World Congress, Lisbon, Portugal, 6−11 Sep 2009</text:p>
      <text:p text:style-name="P18"><text:soft-page-break/>D29. R.Buccianti, M.Cibien, L.Mari, B.Rebaglia, Measurement and calibration: considerations based on the International Vocabulary of Metrology (VIM, 3rd ed.) and related standards, proc. XIX IMEKO World Congress, Lisbon, Portugal, 6−11 Sep 2009</text:p>
      <text:p text:style-name="P18">D28. L.Mari, D.Macii, Alternative methods to estimate measurand values: models and operative implications, proc. 12th IMEKO TC1 &amp; TC7 Joint Symposium on Man, Science &amp; Measurement, 225-230, Annecy, France, 3–5 Sep 2008 – ISBN 2-9516453-8-4</text:p>
      <text:p text:style-name="P18">D27. D.Macii, L.Mari, D.Petri, Measurand value estimation in nonlinear models: a comparison between two averaging methods, proc. IEEE AMUEM 2008, International Workshop on Advanced Methods for Uncertainty Estimation in Measurement, Trento, Italy, 21-22 July 2008</text:p>
      <text:p text:style-name="P18">D26. L.Mari, S.Sartori, The metrological system as a small-world network: some notes for the analysis of its structural efficiency, proc. XVIII IMEKO World Congress, Rio de Janeiro, Brazil, 17–22 Sep 2006</text:p>
      <text:p text:style-name="P18">D25. P.Carbone, L.Buglione, L.Mari, D.Petri, Metrology and software measurement: a comparison of some basic characteristics, proc. IEEE IMTC 2006, 1082-1086, Sorrento, 24-27 Apr 2006</text:p>
      <text:p text:style-name="P18">D24. L.Mari, D.Petri, Propagating uncertainty through discrete time dynamic systems, proc. IEEE AMUEM 2006, International Workshop on Advanced Methods for Uncertainty Estimation in Measurement, 23-26, Trento, 20-21 Apr 2006</text:p>
      <text:p text:style-name="P18">D23. L.Mari, S.Sartori, A relational modeling of measurement and its metrological implications, proc. IMEKO TC1+TC7 Symposium on Metrology and Measurement Education in the Internet Era, Ilmenau, Germany, 21-24 Sep 2005 – ISBN 3-932633-99-7</text:p>
      <text:p text:style-name="P18">D22. F.Bruschi, P.Faverio, R.Hodges, L.Mari, D.Restelli, D.Sciuto, Virtual community in the classroom: an innovating tool for eLearning, proc. IFIP EduTech 2004 (IFIP WG 10.5+WG 3.6), World Computer Congress, Toulouse, France, 26-27 Aug 2004</text:p>
      <text:p text:style-name="P18">D21. L.Mari, On the “paradox of foundation” for measurement, proc. IMEKO TC7 Symposium on Advances of Measurement Science, 55-58, Saint-Petersburg, Russia, 30 Jun-2 Jul 2004 – ISBN 5-93629-167-7</text:p>
      <text:p text:style-name="P18">D20. A.Frigerio, L.Mari, M.Padula, S.Raynaud, The analogue/digital opposition: a semiotic matter, proc. Signs of the world – VIII Congress of the International Association of Semiotic Studies, 33-34, Lyon, France, 7-12 Jul 2004</text:p>
      <text:p text:style-name="P18">D19. S.Genone, C.Mari, A.Ravarini. L.Mari, Innovating through effective eLearning: the eLearning strategy at Università Cattaneo, proc. 1st European Conference on e-Learning and Management Education, Milano, 19 Mar 2004</text:p>
      <text:p text:style-name="P18">D18. L.Mari, The concepts of analog and digital coding in terms of measurement theory, proc. XVII IMEKO World Congress, 1111-1114, Dubrovnik, Croatia, 22-27 Jun 2003 – ISBN 953-7124-00-2</text:p>
      <text:p text:style-name="P18">D17. L.Mari, C.Mari, J.Moro, A.Ravarini, M.Tagliavini, G.Buonanno, “Multifunctional eBook”: a tool to innovate learning situations, proc. European Conference on eLearning, Uxbridge, UK, Novembre 2002</text:p>
      <text:p text:style-name="P18">D16. A.Ravarini, J.Moro, M.Tagliavini, L.Mari, Exploring the relationships between CIO competencies and company performance, proc. SCI 2001, Vol.2, 209-214, Orlando (Fl.), USA, 22-25 Jul 2001</text:p>
      <text:p text:style-name="P18">D15. G.Buonanno, C.Gallazzi, L.Mari, F.Pigni, A.Ravarini, D.Sciuto, M.Tagliavini, eBusiness Models within Small and Medium Enterprises, proc. European eBusiness &amp; eWork Conference 2000</text:p>
      <text:p text:style-name="P18">D14. L.Mari, Metrological issues in weak scale type evaluation, proc. XVI IMEKO World Congress, Vol.5, 93-96, Vienna, Austria, 25-28 Sep 2000 – ISBN 3-901888-07-1</text:p>
      <text:p text:style-name="P18">D13. L.Mari, Notes on the uncertainty of measurement, proc. XV IMEKO World Congress, Vol.2, 89-92, Osaka, Japan, 13-18 Jun 1999</text:p>
      <text:p text:style-name="P18">D12. A.Balsamo, L.Mari, On the metrological evaluation of the software component of intelligent measuring systems, proc. IEEE IMTC 1999, Vol.2, 953-957, Venezia, 24-26 May 1999 – ISBN 0-7803-5276-9</text:p>
      <text:p text:style-name="P18">D11. L.Mari (together with the GMEE Research Units of Firenze and Torino), Quality of measurements and of measurement processes, proc. IMEKO TC-4 Symp. on development in digital measuring instrumentation, 975-980, Napoli, 17-18 Sep 1998</text:p>
      <text:p text:style-name="P18">D10. L.Mari, On the relation between uncertainty and information in measurement, proc. XIV IMEKO World Congress, Vol.5, 89-94, Tampere, 1-6 Jun 1997 – ISBN 951-96567-8-2</text:p>
      <text:p text:style-name="P18">D9. L.Mari, The measurement of quality: a metrological point of view, atti XIV IMEKO World Congress, Vol.5, 71-76, Tampere, 1-6 Jun 1997 – ISBN 951-96567-8-2</text:p>
      <text:p text:style-name="P18">D8. L.Mari, A model integrating operative issues in a theory of measurement, atti XIII IMEKO World Congress, 855-858, Torino, 5-9 Sep 1994</text:p>
      <text:p text:style-name="P18">D7. M.Cunietti, D.Costantini, L.Gonella, L.Mari, M.Savino, Measurement day in Como - An Italian experience, atti XIII IMEKO World Congress, 832-837, Torino, 5-9 Sep 1994</text:p>
      <text:p text:style-name="P18">D6. L.Mari, C.Sacchi, Towards the integration of solid and surface modeling by means of pseudo-boolean operators, proc. IFIP TC 5/WG 5.10 Workshop on Geometric modeling in computer graphics, Genova, 28 Jun-2 Jul 1993</text:p>
      <text:p text:style-name="P18">D5. L.Mari, Remarks on the operative meaning of measurement, proc. European Scientific Metrological Conference, St. Petersburg (Russia), 1-4 Sep 1992</text:p>
      <text:p text:style-name="P18">D4. L.Mari, C.Sacchi, How to perform Pseudo-Booleans with trimmed curves and surfaces exploiting geometry orientation, proc. The mathematics of surfaces, Edinburgh (UK), 14-16 Sep 1992</text:p>
      <text:p text:style-name="P18"><text:soft-page-break/>D3. L.Mari, Notes on the fuzzy set theory as a tool for the measurement theory, proc. XII IMEKO World Congress, Fundamental metrology, measurement theory and education, 70-74, Beijing (China), 5-10 Sep 1991</text:p>
      <text:p text:style-name="P18">D2. P.Bottoni, L.Mari, P.Mussio, Empirical plausible reasoning by multiple-valued logic, proc. IPMU 90, 361-363, Paris (France), 2-6 Jul 1990</text:p>
      <text:p text:style-name="P18">D1. F.Folini, L.Mari, I.Vicini, A parametric CAD system: requirements &amp; functional characteristics, proc. CAPE 89, 115-122, Tokyo (Japan), 2-5 Oct 1989</text:p>
      <text:p text:style-name="Heading_20_3">Pubblicazioni in atti di conferenze nazionali</text:p>
      <text:p text:style-name="P18">E22. A.Mencattini, L.Mari, Una strategia strutturata per definire concetti nella scienza della misurazione: la sensibilità, proc. XXX Congresso Nazionale GMEE, Trento, 8-11 Sep 2013</text:p>
      <text:p text:style-name="P18">E21. F.Pigni, A.Ravarini, S.Astuti, G.Buonanno, L.Mari, RFId in the fashion industry: exploratory case study and implications, proc. ITAIS 2006</text:p>
      <text:p text:style-name="P18">E20. L.Buglione, P.Carbone, L.Mari, D.Petri, Problemi di misurabilità del software in prospettiva della Scienza della Misurazione, proc. XXIII Congresso Nazionale GMEE, L'Aquila, 11-13 Sep 2006</text:p>
      <text:p text:style-name="P18">E19. L.Mari, S.Sartori, La valutazione dell'incertezza come strumento di ottimizzazione dei costi di produzione, proc. XXIII Congresso Nazionale GMEE, L'Aquila, 11-13 Sep 2006</text:p>
      <text:p text:style-name="P18">E18. R.Hodges, J.Moro, C.Vitari, A.Ravarini, L.Mari, Un framework per la classificazione dei sistemi di gestione della conoscenza, proc. ITAIS 2005</text:p>
      <text:p text:style-name="P18">E17. L.Mari, S.Sartori, Analisi dell'efficienza del sistema di riferibilità, proc. XXII Congresso Nazionale GMEE, 23-24, Palermo, 5-7 Sep 2005</text:p>
      <text:p text:style-name="P18">E16. L.Mari, A.Ravarini, G.Buonanno, Valutare o misurare? Un modello e la sua applicazione alla valutazione delle Risorse Umane, proc. ORG 2005, Milano, Feb 2005</text:p>
      <text:p text:style-name="P18">E15. S.Genone, C.Mari, L.Mari, eLearning e nuovi scenari formativi: la mediazione delle tecnologie tra metodologie e finalità didattiche, proc. ExpoEL 2004, Ferrara, Oct 2004</text:p>
      <text:p text:style-name="P18">E14. A.Frigerio, L.Mari, Mondo fisico, informazione, semantica, in: Significare e comprendere: la semantica del linguaggio verbale, proc. XI Congresso Società Italiana di Filosofia del Linguaggio, Milano, 16-18 Sep 2004, A.Frigerio, S.Raynaud (eds.), 41-55, Aracne, 2005 – ISBN 88-548-0228-X</text:p>
      <text:p text:style-name="P18">E13. G.Buonanno, L.Mari, J.Moro, F.Pigni, A.Ravarini, P.Faverio, M.Tagliavini, Tecnologie dell'informazione e della comunicazione e piccole-medie imprese: scenari e opportunità, proc. Congresso Annuale AICA, 15-17 Sep 2003</text:p>
      <text:p text:style-name="P18">E12. L.Mari, D.Sciuto, P.Faverio, R.Hodges, C.Mari, D.Restelli, Comunità virtuale in aula: uno strumento innovativo per l'eLearning, proc. Didamatica 2003, Genova, 2003</text:p>
      <text:p text:style-name="P18">E10. G.Buonanno, F.Pigni, C.Gallazzi, L.Mari, J.Moro, A.Ravarini, D.Sciuto, M.Tagliavini, Scenari di eBusiness nelle PMI, proc. AICA 2001, Como, Sep 2001</text:p>
      <text:p text:style-name="P18">E9. G.Buonanno, L.Mari, F.Pigni, A.Ravarini, S.Scarduelli, D.Sciuto, M.Tagliavini, Valutazione economica dell'adozione di una intranet, proc. AICA 2000, Taormina, Sep 2000</text:p>
      <text:p text:style-name="P18">E8. G.Buonanno, L.Mari, F.Pigni, A.Ravarini, D.Sciuto, M.Tagliavini, “E-libro multifunzionale”: uno strumento per creare nuove situazioni formative, proc. NIR-IT 2000</text:p>
      <text:p text:style-name="P18">E7. G.Buonanno, L.Mari, F.Pigni, A.Ravarini, D.Sciuto, M.Tagliavini, “Comunità virtuale in aula”: uno strumento per creare nuove situazioni formative, proc. NIR-IT 2000</text:p>
      <text:p text:style-name="P18">E6. L.Mari, Verità, (in)certezza e qualità della misurazione: qualche riflessione, proc. XV Congresso Nazionale GMEE, 31-33, Napoli, 16 Sep 1998</text:p>
      <text:p text:style-name="P18">E5. L.Mari, Le relazioni tra informazione ed incertezza nella misurazione, proc. XIII Congresso Nazionale GMEE, 193-196, Santa Cesarea Terme, 26-28 Sep 1996</text:p>
      <text:p text:style-name="P18">E4. L.Mari, Analisi del problema della misurazione della qualità, proc. XII Congresso Nazionale GMEE, 245-250, Bologna, 21-23 Sep 1995</text:p>
      <text:p text:style-name="P18">E3. L.Mari, Note sulla misurabilità della qualità, proc. XVIII Convegno Nazionale AICQ, Varese, 9-11 Nov 1994 </text:p>
      <text:p text:style-name="P18">E2. U.Cugini, L.Mari, Hypermedia for CAD: automatic visual indexing for CAD documents, proc. Automazione 1992, 267-276, vol.3, XXXVI Conv. Naz. ANIPLA, Genova, 16-18 Nov 1992</text:p>
      <text:p text:style-name="P18">E1. F.Folini, L.Mari, I.Vicini, Caratteristiche e potenzialità di un sistema interattivo di CAD parametrico, proc. AICA 1989, 1265-1276, Trieste, 2-5 Oct 1989</text:p>
      <text:p text:style-name="Heading_20_3">Edizioni di numeri di riviste</text:p>
      <text:p text:style-name="P18">F4. L.Mari, A.Giordani, F. Grégis, editors of a special issue on "Measurement at the Crossroads: Measuring and Modeling" of Measurement, 2024</text:p>
      <text:p text:style-name="P18">F3. L.Mari, editor of a special issue on "Historical papers on fundamentals of measurement" of ACTA IMEKO, 3, 1, 2014</text:p>
      <text:p text:style-name="P18">F2. L.Mari, R.Morawski, editors of a special issue on "The evolving science of measurement" of Metrology and Measurement Systems, XIII, 1, 2007</text:p>
      <text:p text:style-name="P18"><text:soft-page-break/>F1. L.Finkelstein, R.Morawski, L.Mari, editors of a special issue on "Logical and philosophical aspects of measurement", Measurement, 38, 4, 2005</text:p>
      <text:p text:style-name="Heading_20_3">Edizioni di libri</text:p>
      <text:p text:style-name="P18">G7. F.Docchio, M.Gasparetto, L.Mari (eds.), Storia delle misure nella società dal 1875 : successi, insuccessi e... occasioni perdute, di S.Sartori, Pavia University Press, 2014, ISBN 9788896764930 (brossura), ISBN 9788896764947</text:p>
      <text:p text:style-name="P18">G6. M.Cunietti, L.Mari (eds.), Atti della XIII Giornata della Misurazione - Discussioni sugli strumenti di misura intelligenti e sull'espressione dell'incertezza nella misurazione, Città Studi, 1995</text:p>
      <text:p text:style-name="P18">G5. M.Cunietti, L.Mari (eds.), Atti della XII Giornata della Misurazione - Introduzione alla filosofia del linguaggio e al significato di incertezza nella misurazione, Città Studi, 1994</text:p>
      <text:p text:style-name="P18">G4. M.Cunietti, L.Mari (eds.), Atti della XI Giornata della Misurazione - Discussione sulla misura nella relazione con scienza e tecnica, Città Studi, 1993</text:p>
      <text:p text:style-name="P18">G3. M.Cunietti, L.Mari (eds.), Atti della X Giornata della Misurazione, Clup - Città Studi, 1992</text:p>
      <text:p text:style-name="P18">G2. M.Cunietti, L.Mari (eds.), Atti della IX Giornata della Misurazione, Clup, 1991</text:p>
      <text:p text:style-name="P18">G1. M.Cunietti, L.Mari (eds.), Documenti introduttivi e Atti delle prime cinque Giornate della Misurazione, Clup - Città Studi, 1991</text:p>
      <text:p text:style-name="Heading_20_3">Libri didattici o di disseminazione culturale</text:p>
      <text:p text:style-name="P18">H10. L.Mari, A.Giordani, con la collaborazione di D.Bellasio, L'Intelligenza Artificiale di Platone - Il pensiero, i chatbot e noi, Il Sole 24 Ore, 2025 - ISBN 9791254844397</text:p>
      <text:p text:style-name="P18">H9. L.Mari, con la collaborazione di D.Bellasio, F.Bertolotti, A.Giordani, L'Intelligenza Artificiale di Dostoevskij - Riflessioni sul futuro, la conoscenza, la responsabilità umana, Il Sole 24 Ore, 2024, ISBN 9791254842447</text:p>
      <text:p text:style-name="P18">H8. L.Mari, M.R.Manzoni, A.Maiello, Giocare a scuola -- Qualche riflessione e un'esperienza, Loescher, I Quaderni della Ricerca n.66, 2022</text:p>
      <text:p text:style-name="P18">H7. L.Mari, G.Buonanno, D.Sciuto, Informatica e cultura dell'informazione, McGraw-Hill, 2007, seconda edizione 2013, ISBN 978-88-386-6381-9</text:p>
      <text:p text:style-name="P18">H6. L.Mari, Atomi &amp; bit – Le ragioni del digitale e del multimediale, Guerini, 2002</text:p>
      <text:p text:style-name="P18">H5. L.Mari, Accesso a database via web, Apogeo, 2001</text:p>
      <text:p text:style-name="P18">H4. D.Sciuto, G.Buonanno, L.Mari, Introduzione ai sistemi informatici, McGraw-Hill, 1997, seconda edizione 2002, terza edizione 2005, quarta edizione 2008, quinta edizione 2014, sesta edizione 2022, ISBN 978-8838655029</text:p>
      <text:p text:style-name="P18">H3. W.Fornaciari, L.Mari, D.Sciuto, L'informazione e la sua comunicazione, Guerini, 1996</text:p>
      <text:p text:style-name="P18">H2. C.Bussolati, V.Chiesa, L.Mari (a cura di), Economia del cambiamento tecnologico - Letture, Guerini, 1996</text:p>
      <text:p text:style-name="P18">H1. C.Bussolati, V.Chiesa, L.Mari, Economia del cambiamento tecnologico, Guerini Scientifica, 1996, ISBN 88-8107-084-7</text:p>
      <text:p text:style-name="Heading_20_3">E-libri</text:p>
      <text:p text:style-name="P18">I4. L.Carimali, L.Mari, Riprogettare il curriculum di matematica: Corso di Formazione Docenti Scuola Secondaria di Secondo Grado, 2011</text:p>
      <text:p text:style-name="P18">I3. L.Mari, Un'introduzione a LabView, 2003</text:p>
      <text:p text:style-name="P18">I2. L.Mari, Strumentazione elettronica di misura – Elettronica digitale, 2002</text:p>
      <text:p text:style-name="P18">I1. L.Mari, I fondamenti della programmazione con HTML e JavaScript, 2001-2003</text:p>
      <text:p text:style-name="P18"/>
      <text:p text:style-name="P16">Allegato 3. Attività didattica universitaria</text:p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4">Insegnamento</text:p>
          </table:table-cell>
          <table:table-cell table:style-name="Table2.A1" office:value-type="string">
            <text:p text:style-name="P24">Contesto</text:p>
          </table:table-cell>
          <table:table-cell table:style-name="Table2.A1" office:value-type="string">
            <text:p text:style-name="P24">Ruolo</text:p>
          </table:table-cell>
          <table:table-cell table:style-name="Table2.A1" office:value-type="string">
            <text:p text:style-name="P24">Periodo</text:p>
          </table:table-cell>
        </table:table-row>
        <table:table-row table:style-name="Table2.1">
          <table:table-cell table:style-name="Table2.A1" office:value-type="string">
            <text:p text:style-name="P25">Data Analysis</text:p>
          </table:table-cell>
          <table:table-cell table:style-name="Table2.A1" office:value-type="string">
            <text:p text:style-name="P25">Università Cattolica, corso di laurea in Filosofia</text:p>
          </table:table-cell>
          <table:table-cell table:style-name="Table2.A1" office:value-type="string">
            <text:p text:style-name="P26">docente</text:p>
          </table:table-cell>
          <table:table-cell table:style-name="Table2.A1" office:value-type="string">
            <text:p text:style-name="P25">2026-</text:p>
          </table:table-cell>
        </table:table-row>
        <table:table-row table:style-name="Table2.1">
          <table:table-cell table:style-name="Table2.A1" office:value-type="string">
            <text:p text:style-name="P27">Introduction to Scientific Knowledge</text:p>
          </table:table-cell>
          <table:table-cell table:style-name="Table2.A1" office:value-type="string">
            <text:p text:style-name="P27">Università Cattaneo, corso di dottorato di ricerca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5">2026-</text:p>
          </table:table-cell>
        </table:table-row>
        <table:table-row table:style-name="Table2.1">
          <table:table-cell table:style-name="Table2.A1" office:value-type="string">
            <text:p text:style-name="P27">Progettazione per Sistemi Dinamici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23-</text:p>
          </table:table-cell>
        </table:table-row>
        <table:table-row table:style-name="Table2.1">
          <table:table-cell table:style-name="Table2.A1" office:value-type="string">
            <text:p text:style-name="P27">Artificial Intelligence for Business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23</text:p>
          </table:table-cell>
        </table:table-row>
        <table:table-row table:style-name="Table2.1">
          <table:table-cell table:style-name="Table2.A1" office:value-type="string">
            <text:p text:style-name="P27">Digital technologies for Fintec</text:p>
          </table:table-cell>
          <table:table-cell table:style-name="Table2.A1" office:value-type="string">
            <text:p text:style-name="P27">Università Cattaneo, corso di laurea in Economia Aziend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21-</text:p>
          </table:table-cell>
        </table:table-row>
        <table:table-row table:style-name="Table2.1">
          <table:table-cell table:style-name="Table2.A1" office:value-type="string">
            <text:p text:style-name="P27">Digital Thinking</text:p>
          </table:table-cell>
          <table:table-cell table:style-name="Table2.A1" office:value-type="string">
            <text:p text:style-name="P27">Università Cattaneo, corso di laurea in Economia Aziend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20-</text:p>
          </table:table-cell>
        </table:table-row>
        <table:table-row table:style-name="Table2.1">
          <table:table-cell table:style-name="Table2.A1" office:value-type="string">
            <text:p text:style-name="P27">Analisi e misura nell'impresa digitale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19-</text:p>
          </table:table-cell>
        </table:table-row>
        <table:table-row table:style-name="Table2.1">
          <table:table-cell table:style-name="Table2.A1" office:value-type="string">
            <text:p text:style-name="P27">Systems theory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17-2023</text:p>
          </table:table-cell>
        </table:table-row>
        <table:table-row table:style-name="Table2.1">
          <table:table-cell table:style-name="Table2.A1" office:value-type="string">
            <text:p text:style-name="P27">Business Services Design and Measurement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14-2017</text:p>
          </table:table-cell>
        </table:table-row>
        <table:table-row table:style-name="Table2.1">
          <table:table-cell table:style-name="Table2.A1" office:value-type="string">
            <text:p text:style-name="P27">Fondamenti di automatica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11-2013</text:p>
          </table:table-cell>
        </table:table-row>
        <table:table-row table:style-name="Table2.1">
          <table:table-cell table:style-name="Table2.A1" office:value-type="string">
            <text:p text:style-name="P27">Introduzione alla filosofia della scienza e alla scienza della misurazione</text:p>
          </table:table-cell>
          <table:table-cell table:style-name="Table2.A1" office:value-type="string">
            <text:p text:style-name="P27">Università Cattaneo, corso di dottorato di ricerca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09-2012</text:p>
          </table:table-cell>
        </table:table-row>
        <table:table-row table:style-name="Table2.1">
          <table:table-cell table:style-name="Table2.A1" office:value-type="string">
            <text:p text:style-name="P27">Progetto e misura della qualità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07-2013</text:p>
          </table:table-cell>
        </table:table-row>
        <table:table-row table:style-name="Table2.1">
          <table:table-cell table:style-name="Table2.A1" office:value-type="string">
            <text:p text:style-name="P27">Applicazioni industriali ICT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07-2009</text:p>
          </table:table-cell>
        </table:table-row>
        <table:table-row table:style-name="Table2.1">
          <table:table-cell table:style-name="Table2.A1" office:value-type="string">
            <text:p text:style-name="P27">Analisi dei dati sperimentali e statistica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06-</text:p>
          </table:table-cell>
        </table:table-row>
        <table:table-row table:style-name="Table2.1">
          <table:table-cell table:style-name="Table2.A1" office:value-type="string">
            <text:p text:style-name="P27">Fondamenti della misurazione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04-2005</text:p>
          </table:table-cell>
        </table:table-row>
        <table:table-row table:style-name="Table2.1">
          <table:table-cell table:style-name="Table2.A1" office:value-type="string">
            <text:p text:style-name="P27">Strumentazione elettronica di misura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02-2003</text:p>
          </table:table-cell>
        </table:table-row>
        <table:table-row table:style-name="Table2.1">
          <table:table-cell table:style-name="Table2.A1" office:value-type="string">
            <text:p text:style-name="P27">Sistemi informativi applicati (reti di calcolatori)</text:p>
          </table:table-cell>
          <table:table-cell table:style-name="Table2.A1" office:value-type="string">
            <text:p text:style-name="P27">Università Cattaneo, corso di laurea in Economia Aziend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02-2006</text:p>
          </table:table-cell>
        </table:table-row>
        <table:table-row table:style-name="Table2.1">
          <table:table-cell table:style-name="Table2.A1" office:value-type="string">
            <text:p text:style-name="P27">Metodologie per la modellizzazione di sistemi complessi</text:p>
          </table:table-cell>
          <table:table-cell table:style-name="Table2.A1" office:value-type="string">
            <text:p text:style-name="P27">Università Cattaneo, corso di dottorato di ricerca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02-2006</text:p>
          </table:table-cell>
        </table:table-row>
        <table:table-row table:style-name="Table2.1">
          <table:table-cell table:style-name="Table2.A1" office:value-type="string">
            <text:p text:style-name="P27">Teoria dei sistemi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01-2022</text:p>
          </table:table-cell>
        </table:table-row>
        <table:table-row table:style-name="Table2.1">
          <table:table-cell table:style-name="Table2.A1" office:value-type="string">
            <text:p text:style-name="P27">Gestione software di sistemi di misura e controllo industriale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seminari</text:p>
          </table:table-cell>
          <table:table-cell table:style-name="Table2.A1" office:value-type="string">
            <text:p text:style-name="P27">2001-2004</text:p>
          </table:table-cell>
        </table:table-row>
        <table:table-row table:style-name="Table2.1">
          <table:table-cell table:style-name="Table2.A1" office:value-type="string">
            <text:p text:style-name="P27">Informatica Applicata</text:p>
          </table:table-cell>
          <table:table-cell table:style-name="Table2.A1" office:value-type="string">
            <text:p text:style-name="P27">Università Cattaneo, corso di laurea in Economia Aziend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01-2005</text:p>
          </table:table-cell>
        </table:table-row>
        <table:table-row table:style-name="Table2.1">
          <table:table-cell table:style-name="Table2.A1" office:value-type="string">
            <text:p text:style-name="P27">Strumentazione elettronica di misura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00-2003</text:p>
          </table:table-cell>
        </table:table-row>
        <table:table-row table:style-name="Table2.1">
          <table:table-cell table:style-name="Table2.A1" office:value-type="string">
            <text:p text:style-name="P27">Fondamenti di informatica 2</text:p>
          </table:table-cell>
          <table:table-cell table:style-name="Table2.A1" office:value-type="string">
            <text:p text:style-name="P27">Università Cattolica di Milano, corso di laurea in Lingue e Letterature Stranier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1998-2006</text:p>
          </table:table-cell>
        </table:table-row>
        <table:table-row table:style-name="Table2.1">
          <table:table-cell table:style-name="Table2.A1" office:value-type="string">
            <text:p text:style-name="P27">Fondamenti di informatica 1</text:p>
          </table:table-cell>
          <table:table-cell table:style-name="Table2.A1" office:value-type="string">
            <text:p text:style-name="P27">Università Cattolica di Milano, corso di laurea in Lingue e Letterature Stranier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1998</text:p>
          </table:table-cell>
        </table:table-row>
        <table:table-row table:style-name="Table2.1">
          <table:table-cell table:style-name="Table2.A1" office:value-type="string">
            <text:p text:style-name="P27">Informatica Generale</text:p>
          </table:table-cell>
          <table:table-cell table:style-name="Table2.A1" office:value-type="string">
            <text:p text:style-name="P27">Università Cattolica di Milano, corso di laurea in Lingue e Letterature Stranier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1998</text:p>
          </table:table-cell>
        </table:table-row>
        <table:table-row table:style-name="Table2.1">
          <table:table-cell table:style-name="Table2.A1" office:value-type="string">
            <text:p text:style-name="P27">Elettronica industriale</text:p>
          </table:table-cell>
          <table:table-cell table:style-name="Table2.A1" office:value-type="string">
            <text:p text:style-name="P27">Università Cattaneo, diploma in Ingegneria Logistica e della Produzion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1997-1999</text:p>
          </table:table-cell>
        </table:table-row>
        <table:table-row table:style-name="Table2.1">
          <table:table-cell table:style-name="Table2.A1" office:value-type="string">
            <text:p text:style-name="P27">Sistemi di elaborazione (Internet e intranet nella strategia aziendale)</text:p>
          </table:table-cell>
          <table:table-cell table:style-name="Table2.A1" office:value-type="string">
            <text:p text:style-name="P27">Università Cattaneo, corso di laurea in Economia Aziend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1997-2002</text:p>
          </table:table-cell>
        </table:table-row>
        <table:table-row table:style-name="Table2.1">
          <table:table-cell table:style-name="Table2.A1" office:value-type="string">
            <text:p text:style-name="P27">Modelli interpretativi nelle scienze <text:soft-page-break/>naturali e sociali</text:p>
          </table:table-cell>
          <table:table-cell table:style-name="Table2.A1" office:value-type="string">
            <text:p text:style-name="P27">Università Cattaneo, corso di laurea in <text:soft-page-break/>Economia Aziendale</text:p>
          </table:table-cell>
          <table:table-cell table:style-name="Table2.A1" office:value-type="string">
            <text:p text:style-name="P27">seminari</text:p>
          </table:table-cell>
          <table:table-cell table:style-name="Table2.A1" office:value-type="string">
            <text:p text:style-name="P27">1996-<text:soft-page-break/>1998</text:p>
          </table:table-cell>
        </table:table-row>
        <table:table-row table:style-name="Table2.1">
          <table:table-cell table:style-name="Table2.A1" office:value-type="string">
            <text:p text:style-name="P27">Elementi di informatica 2</text:p>
          </table:table-cell>
          <table:table-cell table:style-name="Table2.A1" office:value-type="string">
            <text:p text:style-name="P27">Università Cattolica di Milano, corso di laurea in Lingue e Letterature Straniere</text:p>
          </table:table-cell>
          <table:table-cell table:style-name="Table2.A1" office:value-type="string">
            <text:p text:style-name="P27">esercitatore</text:p>
          </table:table-cell>
          <table:table-cell table:style-name="Table2.A1" office:value-type="string">
            <text:p text:style-name="P27">1996</text:p>
          </table:table-cell>
        </table:table-row>
        <table:table-row table:style-name="Table2.1">
          <table:table-cell table:style-name="Table2.A1" office:value-type="string">
            <text:p text:style-name="P27">Gestione dell'informazione aziendale</text:p>
          </table:table-cell>
          <table:table-cell table:style-name="Table2.A1" office:value-type="string">
            <text:p text:style-name="P27">Università Cattaneo, corso di laurea in Economia Aziend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1995-2001</text:p>
          </table:table-cell>
        </table:table-row>
        <table:table-row table:style-name="Table2.1">
          <table:table-cell table:style-name="Table2.A1" office:value-type="string">
            <text:p text:style-name="P27">Economia del cambiamento tecnologico</text:p>
          </table:table-cell>
          <table:table-cell table:style-name="Table2.A1" office:value-type="string">
            <text:p text:style-name="P27">Università Cattaneo, corso di laurea in Economia Aziend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1994-2000</text:p>
          </table:table-cell>
        </table:table-row>
        <table:table-row table:style-name="Table2.1">
          <table:table-cell table:style-name="Table2.A1" office:value-type="string">
            <text:p text:style-name="P27">Elettronica industriale</text:p>
          </table:table-cell>
          <table:table-cell table:style-name="Table2.A1" office:value-type="string">
            <text:p text:style-name="P27">Università Cattaneo, corso di laurea in Economia Aziend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1994</text:p>
          </table:table-cell>
        </table:table-row>
        <table:table-row table:style-name="Table2.1">
          <table:table-cell table:style-name="Table2.A1" office:value-type="string">
            <text:p text:style-name="P27">Dinamica tecnologica 1</text:p>
          </table:table-cell>
          <table:table-cell table:style-name="Table2.A1" office:value-type="string">
            <text:p text:style-name="P27">Università Cattaneo, corso di laurea in Economia Aziend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1993</text:p>
          </table:table-cell>
        </table:table-row>
        <table:table-row table:style-name="Table2.1">
          <table:table-cell table:style-name="Table2.A1" office:value-type="string">
            <text:p text:style-name="P27">Dinamica tecnologica 2</text:p>
          </table:table-cell>
          <table:table-cell table:style-name="Table2.A1" office:value-type="string">
            <text:p text:style-name="P27">Università Cattaneo, corso di laurea in Economia Aziendale</text:p>
          </table:table-cell>
          <table:table-cell table:style-name="Table2.A1" office:value-type="string">
            <text:p text:style-name="P27">esercitatore</text:p>
          </table:table-cell>
          <table:table-cell table:style-name="Table2.A1" office:value-type="string">
            <text:p text:style-name="P27">1993</text:p>
          </table:table-cell>
        </table:table-row>
        <table:table-row table:style-name="Table2.1">
          <table:table-cell table:style-name="Table2.A1" office:value-type="string">
            <text:p text:style-name="P27">Fondamenti di informatica</text:p>
          </table:table-cell>
          <table:table-cell table:style-name="Table2.A1" office:value-type="string">
            <text:p text:style-name="P27">Università Cattaneo, diploma in Tecniche di Gestione della Produzion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1993</text:p>
          </table:table-cell>
        </table:table-row>
        <table:table-row table:style-name="Table2.1">
          <table:table-cell table:style-name="Table2.A1" office:value-type="string">
            <text:p text:style-name="P27">CAD</text:p>
          </table:table-cell>
          <table:table-cell table:style-name="Table2.A1" office:value-type="string">
            <text:p text:style-name="P27">Università Cattaneo, diploma in Tecniche di Gestione della Produzione</text:p>
          </table:table-cell>
          <table:table-cell table:style-name="Table2.A1" office:value-type="string">
            <text:p text:style-name="P27">esercitatore</text:p>
          </table:table-cell>
          <table:table-cell table:style-name="Table2.A1" office:value-type="string">
            <text:p text:style-name="P27">1992</text:p>
          </table:table-cell>
        </table:table-row>
        <table:table-row table:style-name="Table2.1">
          <table:table-cell table:style-name="Table2.A1" office:value-type="string">
            <text:p text:style-name="P27">Tecniche di progettazione automatica</text:p>
          </table:table-cell>
          <table:table-cell table:style-name="Table2.A1" office:value-type="string">
            <text:p text:style-name="P27">Università statale di Milano, corso di laurea in Scienze dell'Informazione</text:p>
          </table:table-cell>
          <table:table-cell table:style-name="Table2.A1" office:value-type="string">
            <text:p text:style-name="P27">cultore della materia</text:p>
          </table:table-cell>
          <table:table-cell table:style-name="Table2.A1" office:value-type="string">
            <text:p text:style-name="P27">1988</text:p>
          </table:table-cell>
        </table:table-row>
        <table:table-row table:style-name="Table2.1">
          <table:table-cell table:style-name="Table2.A1" office:value-type="string">
            <text:p text:style-name="P18">Teoria dei sistemi</text:p>
          </table:table-cell>
          <table:table-cell table:style-name="Table2.A1" office:value-type="string">
            <text:p text:style-name="P27">Università statale di Milano, corso di laurea in Fisica</text:p>
          </table:table-cell>
          <table:table-cell table:style-name="Table2.A1" office:value-type="string">
            <text:p text:style-name="P27">seminari e cultore della materia</text:p>
          </table:table-cell>
          <table:table-cell table:style-name="Table2.A1" office:value-type="string">
            <text:p text:style-name="P27">1987-1994</text:p>
          </table:table-cell>
        </table:table-row>
      </table:table>
      <text:p text:style-name="P22"/>
      <text:p text:style-name="P16"><text:bookmark-start text:name="__RefHeading___Toc7803_2134973952"/>Allegato <text:span text:style-name="T16">4</text:span>. Pubblicazioni su giornali o riviste non scientifiche <text:span text:style-name="T17">a proposito di </text:span><text:span text:style-name="T16">intelligenza artificiale</text:span><text:bookmark-end text:name="__RefHeading___Toc7803_2134973952"/></text:p>
      <text:p text:style-name="Heading_20_3"><text:span text:style-name="T18">Sole 24 Ore</text:span><text:span text:style-name="T19">:</text:span></text:p>
      <text:p text:style-name="Body_20_Text_20_0L">3 marzo 2026, Come funziona un chatbot che si auto-addestra e cosa cambia per l'AI</text:p>
      <text:p text:style-name="Body_20_Text_20_0L">19 febbraio 2026 <text:span text:style-name="T12">(con <text:s/>Alessandro Giordani e Francesco Bertolotti)</text:span>, Il fine giustifica i mezzi dell'Intelligenza artificiale?</text:p>
      <text:p text:style-name="Body_20_Text_20_0L">9 febbraio 2026, Moltbook: il primo social network per agenti IA e le sfide dell'addestramento dei modelli di linguaggio</text:p>
      <text:p text:style-name="Body_20_Text_20_0L">20 novembre 2025 (con Francesco Bertolotti e Alessandro Giordani), Contro i pregiudizi sui chatbot</text:p>
      <text:p text:style-name="Body_20_Text_20_0L">13 ottobre 2025 (con Susanna Sancassani), Intelligenza artificiale: i chatbot aiutano davvero a migliorare la formazione?</text:p>
      <text:p text:style-name="Body_20_Text_20_0L">8 agosto 2025 (con Laura Carlotta Foschi), ChatGPT in "modalità studio": come cambia il ruolo dei chatbot nell'educazione</text:p>
      <text:p text:style-name="Body_20_Text_20_0L">28 luglio 2025 (con Matteo Giangrande), Quando l'IA batte l'uomo: la storia di Lee Se-dol e le cinque fasi del lutto digitale</text:p>
      <text:p text:style-name="Body_20_Text_20_0L">22 luglio 2025 (con Francesco Bertolotti), Le nuove strategie di sviluppo AI: più cultura che dimensioni dei modelli</text:p>
      <text:p text:style-name="Body_20_Text_20_0L">15 giugno 2025 (con Susanna Sancassani), Entrare nel "flow" con i chatbot è possibile: così l'apprendimento diventa appagante ed efficace</text:p>
      <text:p text:style-name="Body_20_Text_20_0L">12 maggio 2025 (con Susanna Sancassani), Impatto dei chatbot sull'apprendimento: idee per linee guida per docenti e studenti</text:p>
      <text:p text:style-name="Body_20_Text_20_0L">5 maggio 2025 (con Alessandro Giordani), Model Spec di OpenAI: etica e responsabilità nell'addestramento dei modelli di linguaggio</text:p>
      <text:p text:style-name="Body_20_Text_20_0L">12 aprile 2025 (con Francesco Bertolotti), MCP: la rivoluzione di Anthropic nell'intelligenza artificiale generativa</text:p>
      <text:p text:style-name="Body_20_Text_20_0L">31 marzo 2025 (con Fiorenzo Festi), Intelligenza artificiale: la sfida della definizione legale e le implicazioni per i professionisti</text:p>
      <text:p text:style-name="Body_20_Text_20_0L">28 marzo 2025 (con Susanna Sancassani), Gli effetti dei chatbot sull'apprendimento: l'importanza della motivazione intrinseca</text:p>
      <text:p text:style-name="Body_20_Text_20_0L">5 marzo 2025, Modelli di ragionamento, ecco le tre nuove caratteristiche dell'intelligenza artificiale (più una)</text:p>
      <text:p text:style-name="Body_20_Text_20_0L">3 febbraio 2025 (con Alessandro Giordani), DeepSeek-R1: il primo modello di ragionamento aperto e autonomo</text:p>
      <text:p text:style-name="Body_20_Text_20_0L">21 novembre 2024 (con Fiorenzo Festi), La proprietà intellettuale nell'era dei sistemi di intelligenza artificiale generativa</text:p>
      <text:p text:style-name="Body_20_Text_20_0L">25 ottobre 2024 (con Alessandro Giordani), L'intelligenza artificiale ci sta rendendo stupidi?</text:p>
      <text:p text:style-name="Body_20_Text_20_0L">23 ottobre 2024 (con Alessandro Giordani), Modelli linguistici: oltre la semplice previsione di parole</text:p>
      <text:p text:style-name="Body_20_Text_20_0L">8 ottobre 2024, Hopfield e Hinton: il Nobel che unisce fisica e intelligenza artificiale</text:p>
      <text:p text:style-name="Body_20_Text_20_0L">3 ottobre 2024, Llama 3.1 405B: Analisi dettagliata del modello linguistico di Meta</text:p>
      <text:p text:style-name="Body_20_Text_20_0L">16 settembre 2024 (con Francesco Bertolotti e Alessandro Giordani), ChatGPT: il ragionamento complesso dei nuovi chatbot</text:p>
      <text:p text:style-name="Body_20_Text_20_0L">10 settembre 2024 (con Alessandro Giordani), L'uso di chatbot come tutor: un'opportunità per migliorare l'apprendimento degli studenti</text:p>
      <text:p text:style-name="Body_20_Text_20_0L">19 luglio 2024 (con Alessandro Giordani), Chatbot: tra errori e utilità, un'analisi della loro natura</text:p>
      <text:p text:style-name="Body_20_Text_20_0L">2 luglio 2024, ChatGPT e il jailbreaking: quando i chatbot superano le barriere di sicurezza</text:p>
      <text:p text:style-name="Body_20_Text_20_0L">6 maggio 2024 (con Francesco Bertolotti), Sistemi chiusi vs sistemi aperti: l'alternativa nella GenAI e nei chatbot</text:p>
      <text:p text:style-name="Body_20_Text_20_0L">9 aprile 2024 (con Alessandro Giordani), Intelligenza artificiale: la voce come copia e l'avvertimento di Platone</text:p>
      <text:p text:style-name="Body_20_Text_20_0L">20 marzo 2024 (con Alessandro Giordani), L'intelligenza artificiale di Platone, un dialogo (preprint di un articolo pubblicato sullo "Speciale del Sole 24 Ore: Intelligenze Artificiali: Le nuove frontiere per professioni, aziende, mercati")</text:p>
      <text:p text:style-name="Body_20_Text_20_0L">16 marzo 2024 (con Francesco Bertolotti e Alessandro Giordani), Intelligenza artificiale, che cosa c'è dietro la causa di Elon Musk contro OpenAI</text:p>
      <text:p text:style-name="Body_20_Text_20_0L"><text:soft-page-break/>19 febbraio 2024 (con Alessandro Giordani), Sora, l'intelligenza artificiale e una nuova sfida (video) per l'informazione</text:p>
      <text:p text:style-name="Body_20_Text_20_0L">13 febbraio 2024 (con Francesco Bertolotti), L'intelligenza artificiale di Dostoevskij: perché la riconoscibilità dei testi generati da IA è un problema (non) importante</text:p>
      <text:p text:style-name="Body_20_Text_20_0L">11 gennaio 2024 (con Francesco Bertolotti), ChatGPT e il copyright: una sfida (non solo) per il giornalismo</text:p>
      <text:p text:style-name="Body_20_Text_20_0L">11 dicembre 2023 (con Francesco Bertolotti), Perché le intelligenze artificiali possono diventare adulte, ma non responsabili</text:p>
      <text:p text:style-name="Body_20_Text_20_0L">7 ottobre 2023 (con Roberto Tognoni), GenAI: come sta cambiando il software development</text:p>
      <text:p text:style-name="Body_20_Text_20_0L">24 luglio 2023 (con Francesco Bertolotti), ChatGPT e gli agenti: una nuova frontiera per l'intelligenza artificiale</text:p>
      <text:p text:style-name="Body_20_Text_20_0L">28 giugno 2023 (con Francesco Bertolotti), ChatGPT e il superamento della distinzione tra cultura “umanistica” e “tecnico-scientifica”</text:p>
      <text:p text:style-name="Body_20_Text_20_0L">19 giugno 2023 (con Alessandro Giordani), Che cos'è un bug? Così Dostoevskij ci aiuta a rispondere e a capire ChatGPT</text:p>
      <text:p text:style-name="Body_20_Text_20_0L">1 giugno 2023 (con Francesco Bertolotti), ChatGPT: uno strumento, un collega, o un consulente?</text:p>
      <text:p text:style-name="Body_20_Text_20_0L">20 maggio 2023 (con Francesco Bertolotti), «Chatbot, che ore sono?», conoscere l'AI con una domanda e tre risposte</text:p>
      <text:p text:style-name="Body_20_Text_20_0L">16 maggio 2023, Intelligenza artificiale, perché fare previsioni questa volta è più difficile</text:p>
      <text:p text:style-name="Heading_20_3">Tutto_Misure:</text:p>
      <text:p text:style-name="P28">settembre 2025 (con Dario Petri), Riflessioni sulla caratterizzazione metrologica dei sistemi di Machine Learning - Sistemi per la classificazione</text:p>
      <text:p text:style-name="P29">giugno 2025 (con Alessandro Giordani e Dario Petri), Un'introduzione all'Intelligenza Artificiale Generativa - Terza parte: Intelligenza Artificiale Generativa</text:p>
      <text:p text:style-name="P29">marzo 2025 (con Alessandro Giordani e Dario Petri), Un'introduzione all'Intelligenza Artificiale Generativa - Seconda parte: Reti neurali artificiali</text:p>
      <text:p text:style-name="P29">dicembre 2024 (con Alessandro Giordani e Dario Petri), Un'introduzione all'Intelligenza Artificiale Generativa - Prima parte: Machine Learning</text:p>
      <text:p text:style-name="P29">maggio 2024 (con Francesco Bertolotti), Un'analisi preliminare della metrologia dell'intelligenza artificiale</text:p>
      <text:p text:style-name="P29">settembre 2023 (con Francesco Bertolotti e Dario Petri), Una breve introduzione ai sistemi di intelligenza artificiale nella prospettiva della metrologia</text:p>
      <text:p text:style-name="P29">giugno 2023 (con Francesco Bertolotti), In dialogo con un agente artificiale a proposito di qualche argomento di metrologia</text:p>
      <text:p text:style-name="Heading_20_3"><text:span text:style-name="T20">Varese Focus</text:span>:</text:p>
      <text:p text:style-name="Body_20_Text_20_0L">16 giugno 2024 (con Francesco Bertolotti), Speciale AI: un numero monografico</text:p>
      <text:p text:style-name="Body_20_Text_20_0L">21 febbraio 2024 (con Francesco Bertolotti), ChatGPT un anno dopo</text:p>
      <text:p text:style-name="Body_20_Text_20_0L">14 dicembre 2023 (con Francesco Bertolotti), L'Intelligenza Artificiale e la questione morale</text:p>
      <text:p text:style-name="Body_20_Text_20_0L">15 novembre 2023 (con Francesco Bertolotti), Intelligenza Artificiale e responsabilità umane</text:p>
      <text:p text:style-name="Body_20_Text_20_0L">28 settembre 2023 (con Francesco Bertolotti), Cosa può fare ChatGPT per un'azienda</text:p>
      <text:p text:style-name="Body_20_Text_20_0L">1 agosto 2023 (con Francesco Bertolotti), Viaggio nel pensiero umano con ChatGPT</text:p>
      <text:p text:style-name="Body_20_Text_20_0L">5 maggio 2023 (con Francesco Bertolotti), E' l'inizio di un nuovo mondo</text:p>
      <text:p text:style-name="Heading_20_3"><text:span text:style-name="T20">AI4Business</text:span>:</text:p>
      <text:p text:style-name="Body_20_Text_20_0L">28 gennaio 2026 (con Simone Simoncini), La RPA e la transizione verso l'orchestrazione agentica su AI</text:p>
      <text:p text:style-name="Body_20_Text_20_0L">24 dicembre 2025 (con Simone Simoncini), AI e Legge 132/2025: una regolazione in bilico</text:p>
      <text:p text:style-name="Body_20_Text_20_0L">3 luglio 2024 (con Francesco Bertolotti), Tool per la generazione di software, cosa possono fare realmente</text:p>
      <text:p text:style-name="Body_20_Text_20_0L">5 settembre 2023 (con Francesco Bertolotti), LLM, come istruirli a rispondere su nuovi documenti</text:p>
      <text:p text:style-name="Body_20_Text_20_0L">16 giugno 2023 (con Francesco Bertolotti), ChatGPT sa scrivere di tante cose ma non le ha mai viste</text:p>
      <text:p text:style-name="Heading_20_3">Headlight, rivista della European School Heads Association (ESHA):</text:p>
      <text:p text:style-name="Body_20_Text_20_0L">febbraio 2025, The Choice - Generative Artificial Intelligence: challenges and opportunities</text:p>
      <text:p text:style-name="Heading_20_3"><text:soft-page-break/>Quaderni di Psicologia - Analisi Transazionale e Scienze Umane</text:p>
      <text:p text:style-name="Body_20_Text_20_0L"><text:span text:style-name="T21">n</text:span>. 82, 2024, <text:span text:style-name="T21">Macchine che imparano e responsabilità umana</text:span></text:p>
      <text:p text:style-name="P30">Sviluppo &amp; Organizzazione</text:p>
      <text:p text:style-name="P31">n. 322, 2025 (con Marta Ingaggiati e Renato Ruffini), L'AI entra nei processi aziendali</text:p>
      <text:p text:style-name="P30">Nuova Secondaria</text:p>
      <text:p text:style-name="P31">n. 6, febbraio 2026 (con Francesco Bertolotti, Lorella Carimali, Laura Carlotta Foschi, Alessandro Giordani, Alberto Negrini, Chiara Pisoni, Susanna Sancassani, Paolo Zuffinetti), Intelligenza artificiale e formazione: perché e come imparare e insegnare oggi?</text:p>
      <text:p text:style-name="P30">Letture Lente</text:p>
      <text:p text:style-name="P31">3 aprile 2026, Il senso dell'addestramento nei modelli di linguaggi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zxx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zxx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00%" fo:text-align="justify" style:justify-single-word="false" style:page-number="auto"/>
      <style:text-properties style:font-name="Times New Roman" fo:font-family="'Times New Roman'" style:font-family-generic="roman" style:font-pitch="variable" fo:font-size="11pt" style:font-size-asian="11pt" style:font-size-complex="11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lef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left="0cm" fo:margin-right="0cm" fo:margin-top="0.423cm" fo:margin-bottom="0.212cm" style:contextual-spacing="false" fo:line-height="100%" fo:text-indent="0cm" style:auto-text-indent="false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left="0cm" fo:margin-right="0cm" fo:margin-top="0.353cm" fo:margin-bottom="0.212cm" style:contextual-spacing="false" fo:line-height="100%" fo:text-indent="0cm" style:auto-text-indent="false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style:font-name="Times New Roman" fo:font-family="'Times New Roman'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ody_20_Text_20_L" style:display-name="Body Text L" style:family="paragraph" style:parent-style-name="Text_20_body">
      <loext:graphic-properties draw:fill="none" draw:fill-color="#729fcf"/>
      <style:paragraph-properties fo:margin-left="0.3cm" fo:margin-right="0cm" fo:margin-top="0cm" fo:margin-bottom="0.247cm" style:contextual-spacing="false" fo:line-height="100%" fo:text-align="justify" style:justify-single-word="false" fo:text-indent="-0.3cm" style:auto-text-indent="false" fo:background-color="transparent"/>
      <style:text-properties style:font-name="Times New Roman" fo:font-family="'Times New Roman'" style:font-family-generic="roman" style:font-pitch="variable" fo:font-size="11pt" fo:font-weight="normal" style:font-size-asian="11pt" style:font-weight-asian="normal" style:font-size-complex="11pt" style:font-weight-complex="normal"/>
    </style:style>
    <style:style style:name="Body_20_Text_20_0" style:display-name="Body Text 0" style:family="paragraph" style:parent-style-name="Text_20_body">
      <style:paragraph-properties fo:margin-top="0cm" fo:margin-bottom="0cm" style:contextual-spacing="false"/>
    </style:style>
    <style:style style:name="Body_20_Text_20_0L" style:display-name="Body Text 0L" style:family="paragraph" style:parent-style-name="Body_20_Text_20_0">
      <loext:graphic-properties draw:fill="none" draw:fill-color="#729fcf"/>
      <style:paragraph-properties fo:margin-left="0.3cm" fo:margin-right="0cm" fo:margin-top="0cm" fo:margin-bottom="0cm" style:contextual-spacing="false" fo:line-height="100%" fo:text-align="justify" style:justify-single-word="false" fo:text-indent="-0.3cm" style:auto-text-indent="false"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color="#0000ff" loext:opacity="100%" fo:font-size="10pt" style:text-underline-style="solid" style:text-underline-width="auto" style:text-underline-color="font-color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6.443cm" fo:margin-left="-0.381cm" fo:margin-top="0cm" fo:margin-bottom="0cm" fo:break-before="auto" fo:break-after="auto" table:align="left"/>
    </style:style>
    <style:style style:name="Table1.A" style:family="table-column">
      <style:table-column-properties style:column-width="16.44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lef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7.325cm" style:type="center"/>
          <style:tab-stop style:position="14.6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pt" fo:font-style="normal" style:text-underline-style="none" fo:font-weight="normal" style:font-name-asian="Times New Roman1" style:font-size-asian="1pt" style:font-style-asian="normal" style:font-weight-asian="normal" style:font-name-complex="Times New Roman1" style:font-size-complex="1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right" style:justify-single-word="false" fo:keep-together="auto" fo:orphans="2" fo:widows="2" fo:text-indent="0cm" style:auto-text-indent="false" fo:padding="0cm" fo:border="none" fo:keep-with-next="auto">
        <style:tab-stops>
          <style:tab-stop style:position="5.752cm"/>
        </style:tab-stops>
      </style:paragraph-properties>
      <style:text-properties style:font-name="Times New Roman" fo:font-size="10pt" style:font-size-asian="10pt" style:font-size-complex="10pt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lef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5.75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 Narrow" fo:font-size="9pt" fo:font-style="normal" style:text-underline-style="none" fo:font-weight="normal" style:font-name-asian="Arial Narrow1" style:font-size-asian="9pt" style:font-style-asian="normal" style:font-weight-asian="normal" style:font-name-complex="Arial Narrow1" style:font-size-complex="9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fo:font-style="italic" style:text-underline-style="none" fo:font-weight="normal" style:font-name-asian="Arial Narrow1" style:font-style-asian="italic" style:font-weight-asian="normal" style:font-name-complex="Arial Narrow1"/>
    </style:style>
    <style:style style:name="MT2" style:family="text">
      <style:text-properties fo:font-variant="normal" fo:text-transform="none" fo:color="#0000ff" loext:opacity="100%" style:text-line-through-style="none" style:text-line-through-type="none" style:text-position="0% 100%" fo:font-style="italic" style:text-underline-style="none" fo:font-weight="bold" style:font-name-asian="Arial Narrow1" style:font-style-asian="italic" style:font-weight-asian="bold" style:font-name-complex="Arial Narrow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cm" fo:margin-left="0cm" fo:margin-right="0cm" fo:margin-top="0.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MP2"><text:span text:style-name="MT1">Pagina </text:span><text:page-number text:select-page="current">21</text:page-number><text:span text:style-name="MT1"><text:s/>- Curriculum vitae di </text:span><text:span text:style-name="MT2">Luca Mari</text:span></text:p>
            </table:table-cell>
          </table:table-row>
        </table:table>
        <text:p text:style-name="MP3"><text:tab/></text:p>
      </style:footer>
    </style:master-page>
    <style:master-page style:name="HTML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  <dc:date>2026-04-13T11:38:18.598393811</dc:date>
    <dc:creator>Luca Mari</dc:creator>
    <meta:editing-duration>PT3H35M26S</meta:editing-duration>
    <meta:editing-cycles>42</meta:editing-cycles>
    <meta:print-date>2026-04-13T11:23:06.645862337</meta:print-date>
    <meta:printed-by>PDF files: Luca Mari</meta:printed-by>
    <meta:document-statistic meta:table-count="2" meta:image-count="1" meta:object-count="0" meta:page-count="21" meta:paragraph-count="658" meta:word-count="9863" meta:character-count="75565" meta:non-whitespace-character-count="66256"/>
  </office:meta>
</office:document-meta>
</file>